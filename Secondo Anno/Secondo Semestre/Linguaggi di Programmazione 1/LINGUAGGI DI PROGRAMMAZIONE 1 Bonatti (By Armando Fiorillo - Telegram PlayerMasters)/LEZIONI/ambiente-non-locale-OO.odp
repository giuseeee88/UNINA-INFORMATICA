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D000002611A50CA7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11.438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21cm"/>
    </style:style>
    <style:style style:name="gr5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109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4.207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ff" draw:fill="none" draw:textarea-horizontal-align="justify" draw:textarea-vertical-align="middle" draw:auto-grow-height="false"/>
    </style:style>
    <style:style style:name="gr12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heads_20_1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cm" fo:min-width="11.438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2.9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2.902cm"/>
    </style:style>
    <style:style style:name="gr2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464cm"/>
    </style:style>
    <style:style style:name="gr2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start"/>
    </style:style>
    <style:style style:name="P5" style:family="paragraph">
      <style:text-properties fo:color="#0000ff" fo:font-size="24pt" style:font-size-asian="24pt" style:font-size-complex="24pt"/>
    </style:style>
    <style:style style:name="P6" style:family="paragraph">
      <style:text-properties fo:font-family="'Courier 10 Pitch'" style:font-pitch="fixed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end"/>
    </style:style>
    <style:style style:name="P13" style:family="paragraph">
      <style:text-properties fo:color="#ff0000"/>
    </style:style>
    <style:style style:name="P14" style:family="paragraph">
      <style:paragraph-properties fo:text-align="center"/>
      <style:text-properties fo:color="#ff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4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5" style:family="text">
      <style:text-properties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ff0000" fo:font-size="24pt" style:font-size-asian="24pt" style:font-size-complex="24pt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color="#ff0000" fo:font-size="24pt" style:text-underline-style="none" fo:font-weight="normal" style:font-size-asian="24pt" style:font-weight-asian="normal" style:font-size-complex="24pt" style:font-weight-complex="normal"/>
    </style:style>
    <style:style style:name="T10" style:family="text">
      <style:text-properties fo:color="#ff0000"/>
    </style:style>
    <style:style style:name="T11" style:family="text">
      <style:text-properties fo:color="#280099" fo:font-family="'Courier 10 Pitch'" style:font-pitch="fixed" fo:font-weight="bold" style:font-weight-asian="bold" style:font-weight-complex="bold"/>
    </style:style>
    <style:style style:name="T12" style:family="text">
      <style:text-properties fo:color="#280099" fo:font-family="'Courier 10 Pitch'" style:font-pitch="fixed"/>
    </style:style>
    <style:style style:name="T13" style:family="text">
      <style:text-properties fo:font-family="'Courier 10 Pitch'" style:font-pitch="fixed"/>
    </style:style>
    <style:style style:name="T14" style:family="text">
      <style:text-properties fo:color="#280099" fo:font-family="'Courier 10 Pitch'" style:font-pitch="fixed" fo:font-weight="normal" style:font-weight-asian="normal" style:font-weight-complex="normal"/>
    </style:style>
    <style:style style:name="T15" style:family="text">
      <style:text-properties fo:font-family="'Courier 10 Pitch'" style:font-pitch="fixed" fo:font-weight="normal" style:font-weight-asian="normal" style:font-weight-complex="normal"/>
    </style:style>
    <style:style style:name="T16" style:family="text">
      <style:text-properties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ff0000" fo:font-size="20pt" style:font-size-asian="20pt" style:font-size-complex="20pt"/>
    </style:style>
    <style:style style:name="T22" style:family="text">
      <style:text-properties fo:color="#ff0000" fo:font-size="20pt" fo:font-style="italic" style:font-size-asian="20pt" style:font-style-asian="italic" style:font-size-complex="20pt" style:font-style-complex="italic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color="#ff0000" fo:font-size="20pt" fo:font-weight="normal" style:font-size-asian="20pt" style:font-weight-asian="normal" style:font-size-complex="20pt" style:font-weight-complex="normal"/>
    </style:style>
    <style:style style:name="T26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color="#ff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color="#ff0000" fo:font-weight="normal" style:font-weight-asian="normal" style:font-weight-complex="normal"/>
    </style:style>
    <style:style style:name="T30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mbiente non locale</text:p>
          </draw:text-box>
        </draw:frame>
        <draw:frame presentation:style-name="pr2" draw:layer="layout" svg:width="24.639cm" svg:height="12.178cm" svg:x="1.4cm" svg:y="4.914cm" presentation:class="subtitle">
          <draw:text-box>
            <text:p>dal paradigma imperativo a quello a oggetti</text:p>
            <text:p/>
            <text:p><text:span text:style-name="T1">Piero Bonatt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Ambiente non locale nel paradigma imperativo</text:p>
          </draw:text-box>
        </draw:frame>
        <draw:frame draw:style-name="gr2" draw:text-style-name="P1" draw:layer="layout" svg:width="13.97cm" svg:height="7.62cm" svg:x="11.946cm" svg:y="4.696cm">
          <draw:text-box>
            <text:list text:style-name="L2">
              <text:list-item>
                <text:p><text:span text:style-name="T2">Interamente contenuto nello stack di attivazione</text:span></text:p>
                <text:list>
                  <text:list-header>
                    <text:p><text:span text:style-name="T2"/></text:p>
                  </text:list-header>
                </text:list>
              </text:list-item>
              <text:list-item>
                <text:p><text:span text:style-name="T2">Interamente determinato dallo scoping</text:span></text:p>
                <text:list>
                  <text:list-item>
                    <text:p><text:span text:style-name="T2">(statico o dinamico)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0.926cm" svg:height="16.112cm" svg:x="0.852cm" svg:y="4.344cm">
          <draw:image xlink:href="Pictures/100000000000019D000002611A50CA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Ambiente non locale nel paradigma a oggetti – versione base</text:p>
          </draw:text-box>
        </draw:frame>
        <draw:frame draw:style-name="gr2" draw:text-style-name="P1" draw:layer="layout" svg:width="13.97cm" svg:height="15.355cm" svg:x="11.946cm" svg:y="4.696cm">
          <draw:text-box>
            <text:list text:style-name="L2">
              <text:list-item>
                <text:p><text:span text:style-name="T2">Consiste negli attributi dell'oggetto che esegue il metodo</text:span></text:p>
                <text:list>
                  <text:list-header>
                    <text:p><text:span text:style-name="T2"/></text:p>
                  </text:list-header>
                </text:list>
              </text:list-item>
              <text:list-item>
                <text:p><text:span text:style-name="T2">È ancora una forma di scoping statico</text:span></text:p>
                <text:list>
                  <text:list-item>
                    <text:p><text:span text:style-name="T2">(attributi dichiarati nel blocco-classe che contiene il metodo)</text:span></text:p>
                    <text:p><text:span text:style-name="T2"/></text:p>
                  </text:list-item>
                </text:list>
              </text:list-item>
              <text:list-item>
                <text:p><text:span text:style-name="T2">È allocato nello </text:span><text:span text:style-name="T3">heap</text:span></text:p>
                <text:p><text:span text:style-name="T3"/></text:p>
              </text:list-item>
              <text:list-item>
                <text:p><text:span text:style-name="T3">Viene indicato esplicitamente</text:span></text:p>
                <text:list>
                  <text:list-item>
                    <text:p><text:span text:style-name="T4">con il destinatario del messaggio</text:span></text:p>
                  </text:list-item>
                  <text:list-item>
                    <text:p><text:span text:style-name="T4">(</text:span><text:span text:style-name="T5">this</text:span><text:span text:style-name="T6"> se il destinatario non viene specificato)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1" xml:id="id1" draw:id="id1" draw:layer="layout" svg:width="6.684cm" svg:height="1.46cm" svg:x="3.279cm" svg:y="4.838cm">
          <draw:text-box>
            <text:p><text:span text:style-name="T7">x</text:span><text:span text:style-name="T1">.metodo(...)</text:span></text:p>
          </draw:text-box>
        </draw:frame>
        <draw:custom-shape draw:style-name="gr5" draw:text-style-name="P2" draw:layer="layout" svg:width="7.62cm" svg:height="9.859cm" svg:x="2.633cm" svg:y="6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.745cm" svg:height="1.359cm" svg:x="4.926cm" svg:y="16.255cm">
          <draw:text-box>
            <text:p><text:span text:style-name="T8">Heap</text:span></text:p>
          </draw:text-box>
        </draw:frame>
        <draw:custom-shape draw:style-name="gr7" draw:text-style-name="P4" xml:id="id2" draw:id="id2" draw:layer="layout" svg:width="4.78cm" svg:height="3.07cm" svg:x="4.667cm" svg:y="9.37cm">
          <text:p text:style-name="P4">attr1 = ….</text:p>
          <text:p text:style-name="P4">attr2 = …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draw:type="curve" svg:x1="3.279cm" svg:y1="5.568cm" svg:x2="4.667cm" svg:y2="10.905cm" draw:start-shape="id1" draw:start-glue-point="3" draw:end-shape="id2" svg:d="m3279 5568c-750 0-1444 5337 1388 5337" svg:viewBox="0 0 2051 5338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Ambiente non locale nel paradigma a oggetti – versione generale</text:p>
          </draw:text-box>
        </draw:frame>
        <draw:frame draw:style-name="gr2" draw:text-style-name="P1" draw:layer="layout" svg:width="13.97cm" svg:height="16.299cm" svg:x="11.946cm" svg:y="4.696cm">
          <draw:text-box>
            <text:list text:style-name="L2">
              <text:list-item>
                <text:p><text:span text:style-name="T2">Ancora scoping statico</text:span></text:p>
                <text:list>
                  <text:list-item>
                    <text:p><text:span text:style-name="T2">(attributi dichiarati nei blocchi-classe contenenti il metodo)</text:span></text:p>
                    <text:p><text:span text:style-name="T2"/></text:p>
                  </text:list-item>
                </text:list>
              </text:list-item>
              <text:list-item>
                <text:p><text:span text:style-name="T2">È ancora allocato nello </text:span><text:span text:style-name="T3">heap</text:span></text:p>
                <text:list>
                  <text:list-item>
                    <text:p><text:span text:style-name="T4">sono attributi di </text:span><text:span text:style-name="T5">oggetti</text:span></text:p>
                  </text:list-item>
                </text:list>
                <text:p><text:span text:style-name="T3"/></text:p>
              </text:list-item>
              <text:list-item>
                <text:p><text:span text:style-name="T3">Ma uscendo da ogni blocco si cambia classe</text:span></text:p>
                <text:list>
                  <text:list-item>
                    <text:p><text:span text:style-name="T4">passando quindi a un oggetto diverso!</text:span></text:p>
                  </text:list-item>
                  <text:list-item>
                    <text:p><text:span text:style-name="T9">Quale???</text:span></text:p>
                    <text:p><text:span text:style-name="T6"/></text:p>
                  </text:list-item>
                </text:list>
              </text:list-item>
              <text:list-item>
                <text:p><text:span text:style-name="T3">Stessa filosofia: Viene indicato esplicitamente</text:span></text:p>
                <text:list>
                  <text:list-item>
                    <text:p><text:span text:style-name="T9">Come???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6.955cm" svg:height="6.859cm" svg:x="3.292cm" svg:y="5.114cm">
          <draw:text-box>
            <text:p text:style-name="P5">class A {</text:p>
            <text:p text:style-name="P5"><text:s text:c="3"/>type1 attr1;</text:p>
            <text:p text:style-name="P5"><text:s text:c="3"/><text:span text:style-name="T10">class B {</text:span></text:p>
            <text:p text:style-name="P5"><text:span text:style-name="T10"><text:s text:c="6"/></text:span><text:span text:style-name="T10">type2 attr2;</text:span></text:p>
            <text:p text:style-name="P5"><text:span text:style-name="T10"><text:s text:c="6"/></text:span><text:span text:style-name="T10">metodo(...)</text:span></text:p>
            <text:p text:style-name="P5"><text:span text:style-name="T10"><text:s text:c="3"/></text:span><text:span text:style-name="T10">}</text:span></text:p>
            <text:p text:style-name="P5">}</text:p>
          </draw:text-box>
        </draw:frame>
        <draw:custom-shape draw:style-name="gr10" draw:text-style-name="P2" xml:id="id4" draw:id="id4" draw:layer="layout" svg:width="3.175cm" svg:height="1.72cm" svg:x="3.871cm" svg:y="12.358cm">
          <text:p text:style-name="P2">Object</text:p>
          <draw:enhanced-geometry svg:viewBox="0 0 21600 21600" draw:type="rectangle" draw:enhanced-path="M 0 0 L 21600 0 21600 21600 0 21600 0 0 Z N"/>
        </draw:custom-shape>
        <draw:custom-shape draw:style-name="gr11" draw:text-style-name="P2" xml:id="id3" draw:id="id3" draw:layer="layout" svg:width="2.159cm" svg:height="1.405cm" svg:x="1.87cm" svg:y="15.55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12" draw:text-style-name="P2" xml:id="id5" draw:id="id5" draw:layer="layout" svg:width="2.159cm" svg:height="1.405cm" svg:x="6.669cm" svg:y="15.556cm">
          <text:p text:style-name="P2">B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2.949cm" svg:y1="15.557cm" svg:x2="5.458cm" svg:y2="14.078cm" draw:start-shape="id3" draw:start-glue-point="0" draw:end-shape="id4" draw:end-glue-point="2" svg:d="m2949 15557v-740h2509v-739" svg:viewBox="0 0 2510 1480">
          <text:p/>
        </draw:connector>
        <draw:connector draw:style-name="gr13" draw:text-style-name="P2" draw:layer="layout" svg:x1="7.748cm" svg:y1="15.556cm" svg:x2="5.458cm" svg:y2="14.078cm" draw:start-shape="id5" draw:start-glue-point="0" draw:end-shape="id4" draw:end-glue-point="2" svg:d="m7748 15556v-739h-2290v-739" svg:viewBox="0 0 2291 1479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Annidamento (nesting)</text:p>
          </draw:text-box>
        </draw:frame>
        <draw:frame draw:style-name="gr14" draw:text-style-name="P6" draw:layer="layout" svg:width="7.62cm" svg:height="12.127cm" svg:x="1.524cm" svg:y="5.588cm">
          <draw:text-box>
            <text:p><text:span text:style-name="T11">program</text:span><text:span text:style-name="T12"> </text:span><text:span text:style-name="T11">p</text:span><text:span text:style-name="T13">;</text:span></text:p>
            <text:p><text:span text:style-name="T13"><text:s text:c="3"/></text:span><text:span text:style-name="T13">var a,b,c int;</text:span></text:p>
            <text:p><text:span text:style-name="T13"/></text:p>
            <text:p><text:span text:style-name="T13"><text:tab/></text:span><text:span text:style-name="T11">procedure</text:span><text:span text:style-name="T12"> </text:span><text:span text:style-name="T11">q</text:span><text:span text:style-name="T14">;</text:span></text:p>
            <text:p><text:span text:style-name="T13"><text:s text:c="3"/></text:span><text:span text:style-name="T13">var a,c int;</text:span></text:p>
            <text:p><text:span text:style-name="T13"/></text:p>
            <text:p><text:span text:style-name="T13"><text:s text:c="6"/></text:span><text:span text:style-name="T11">procedure</text:span><text:span text:style-name="T12"> </text:span><text:span text:style-name="T11">r</text:span><text:span text:style-name="T14">;</text:span></text:p>
            <text:p><text:span text:style-name="T15"><text:s text:c="6"/></text:span><text:span text:style-name="T15">var a int;</text:span></text:p>
            <text:p><text:span text:style-name="T15"><text:s text:c="6"/></text:span><text:span text:style-name="T15">... </text:span></text:p>
            <text:p><text:span text:style-name="T15"><text:s text:c="3"/></text:span><text:span text:style-name="T15">... </text:span></text:p>
            <text:p><text:span text:style-name="T13"/></text:p>
            <text:p><text:span text:style-name="T15"><text:tab/></text:span><text:span text:style-name="T11">procedure</text:span><text:span text:style-name="T14"> </text:span><text:span text:style-name="T11">s</text:span><text:span text:style-name="T14">;</text:span></text:p>
            <text:p><text:span text:style-name="T13"><text:s text:c="3"/></text:span><text:span text:style-name="T13">var b int;</text:span></text:p>
            <text:p><text:span text:style-name="T15"><text:s text:c="3"/></text:span><text:span text:style-name="T15">... </text:span></text:p>
            <text:p><text:span text:style-name="T15">... </text:span></text:p>
            <text:p><text:span text:style-name="T13"/></text:p>
          </draw:text-box>
        </draw:frame>
        <draw:frame draw:style-name="gr15" draw:text-style-name="P7" draw:layer="layout" svg:width="13.97cm" svg:height="5.376cm" svg:x="11.946cm" svg:y="4.596cm">
          <draw:text-box>
            <text:list text:style-name="L2">
              <text:list-item>
                <text:p><text:span text:style-name="T16">L'annidamento si può rappresentare come un albero</text:span></text:p>
              </text:list-item>
              <text:list-item>
                <text:p><text:span text:style-name="T16">I livelli dell'albero di nesting corrispondono ai livelli di nesting</text:span></text:p>
              </text:list-item>
            </text:list>
          </draw:text-box>
        </draw:frame>
        <draw:custom-shape draw:style-name="gr16" draw:text-style-name="P8" draw:layer="layout" svg:width="1.524cm" svg:height="1.524cm" svg:x="18.945cm" svg:y="13.045cm">
          <text:p text:style-name="P2"><text:span text:style-name="T17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524cm" svg:height="1.524cm" svg:x="21.245cm" svg:y="10.545cm">
          <text:p text:style-name="P2"><text:span text:style-name="T1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524cm" svg:height="1.524cm" svg:x="18.945cm" svg:y="16.345cm">
          <text:p text:style-name="P2"><text:span text:style-name="T17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524cm" svg:height="1.524cm" svg:x="23.645cm" svg:y="13.045cm">
          <text:p text:style-name="P2"><text:span text:style-name="T1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5.709cm" svg:height="0.962cm" svg:x="13.6cm" svg:y="10.776cm">
          <draw:text-box>
            <text:p>Livello di nesting 0</text:p>
          </draw:text-box>
        </draw:frame>
        <draw:frame draw:style-name="gr17" draw:layer="layout" svg:width="5.709cm" svg:height="0.962cm" svg:x="11.901cm" svg:y="13.276cm">
          <draw:text-box>
            <text:p>Livello di nesting 1</text:p>
          </draw:text-box>
        </draw:frame>
        <draw:frame draw:style-name="gr17" draw:layer="layout" svg:width="5.709cm" svg:height="0.962cm" svg:x="11.801cm" svg:y="16.676cm">
          <draw:text-box>
            <text:p>Livello di nesting 2</text:p>
          </draw:text-box>
        </draw:frame>
        <draw:line draw:style-name="gr18" draw:text-style-name="P2" draw:layer="layout" svg:x1="19.812cm" svg:y1="16.345cm" svg:x2="19.812cm" svg:y2="14.569cm">
          <text:p/>
        </draw:line>
        <draw:line draw:style-name="gr18" draw:text-style-name="P2" draw:layer="layout" svg:x1="20.32cm" svg:y1="13.045cm" svg:x2="21.59cm" svg:y2="11.938cm">
          <text:p/>
        </draw:line>
        <draw:line draw:style-name="gr18" draw:text-style-name="P2" draw:layer="layout" svg:x1="23.645cm" svg:y1="13.208cm" svg:x2="22.606cm" svg:y2="12.069cm">
          <text:p/>
        </draw:line>
        <draw:frame draw:style-name="gr17" draw:layer="layout" svg:width="11.746cm" svg:height="0.962cm" svg:x="11.938cm" svg:y="19.004cm">
          <draw:text-box>
            <text:p>Le frecce indicano l'ambiente non locale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layer="layout" svg:width="25.199cm" svg:height="3.506cm" svg:x="1.4cm" svg:y="0.837cm" presentation:class="title" presentation:user-transformed="true">
          <draw:text-box>
            <text:p>Rappresentazione variabili non locali</text:p>
          </draw:text-box>
        </draw:frame>
        <draw:frame draw:style-name="gr14" draw:text-style-name="P6" draw:layer="layout" svg:width="7.62cm" svg:height="12.127cm" svg:x="1.524cm" svg:y="5.588cm">
          <draw:text-box>
            <text:p><text:span text:style-name="T11">program</text:span><text:span text:style-name="T12"> </text:span><text:span text:style-name="T11">p</text:span><text:span text:style-name="T13">;</text:span></text:p>
            <text:p><text:span text:style-name="T13"><text:s text:c="3"/></text:span><text:span text:style-name="T13">var a,b,c int;</text:span></text:p>
            <text:p><text:span text:style-name="T13"/></text:p>
            <text:p><text:span text:style-name="T13"><text:tab/></text:span><text:span text:style-name="T11">procedure</text:span><text:span text:style-name="T12"> </text:span><text:span text:style-name="T11">q</text:span><text:span text:style-name="T14">;</text:span></text:p>
            <text:p><text:span text:style-name="T13"><text:s text:c="3"/></text:span><text:span text:style-name="T13">var a,c int;</text:span></text:p>
            <text:p><text:span text:style-name="T13"/></text:p>
            <text:p><text:span text:style-name="T13"><text:s text:c="6"/></text:span><text:span text:style-name="T11">procedure</text:span><text:span text:style-name="T12"> </text:span><text:span text:style-name="T11">r</text:span><text:span text:style-name="T14">;</text:span></text:p>
            <text:p><text:span text:style-name="T15"><text:s text:c="6"/></text:span><text:span text:style-name="T15">var a int;</text:span></text:p>
            <text:p><text:span text:style-name="T15"><text:s text:c="6"/></text:span><text:span text:style-name="T15">... </text:span></text:p>
            <text:p><text:span text:style-name="T15"><text:s text:c="3"/></text:span><text:span text:style-name="T15">... </text:span></text:p>
            <text:p><text:span text:style-name="T13"/></text:p>
            <text:p><text:span text:style-name="T15"><text:tab/></text:span><text:span text:style-name="T11">procedure</text:span><text:span text:style-name="T14"> </text:span><text:span text:style-name="T11">s</text:span><text:span text:style-name="T14">;</text:span></text:p>
            <text:p><text:span text:style-name="T13"><text:s text:c="3"/></text:span><text:span text:style-name="T13">var b int;</text:span></text:p>
            <text:p><text:span text:style-name="T15"><text:s text:c="3"/></text:span><text:span text:style-name="T15">... </text:span></text:p>
            <text:p><text:span text:style-name="T15">... </text:span></text:p>
            <text:p><text:span text:style-name="T13"/></text:p>
          </draw:text-box>
        </draw:frame>
        <draw:custom-shape draw:style-name="gr16" draw:text-style-name="P8" draw:layer="layout" svg:width="1.238cm" svg:height="1.181cm" svg:x="13.517cm" svg:y="7.183cm">
          <text:p text:style-name="P2"><text:span text:style-name="T17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238cm" svg:height="1.181cm" svg:x="15.385cm" svg:y="5.245cm">
          <text:p text:style-name="P2"><text:span text:style-name="T1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238cm" svg:height="1.181cm" svg:x="13.517cm" svg:y="9.741cm">
          <text:p text:style-name="P2"><text:span text:style-name="T17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238cm" svg:height="1.181cm" svg:x="17.334cm" svg:y="7.183cm">
          <text:p text:style-name="P2"><text:span text:style-name="T1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4.189cm" svg:height="0.962cm" svg:x="11.368cm" svg:y="5.424cm">
          <draw:text-box>
            <text:p>Liv. nesting 0</text:p>
          </draw:text-box>
        </draw:frame>
        <draw:frame draw:style-name="gr20" draw:layer="layout" svg:width="4.189cm" svg:height="0.962cm" svg:x="9.501cm" svg:y="7.362cm">
          <draw:text-box>
            <text:p>Liv. nesting 1</text:p>
          </draw:text-box>
        </draw:frame>
        <draw:frame draw:style-name="gr19" draw:layer="layout" svg:width="4.189cm" svg:height="0.962cm" svg:x="9.582cm" svg:y="9.997cm">
          <draw:text-box>
            <text:p>Liv. nesting 2</text:p>
          </draw:text-box>
        </draw:frame>
        <draw:line draw:style-name="gr18" draw:text-style-name="P2" draw:layer="layout" svg:x1="14.221cm" svg:y1="9.741cm" svg:x2="14.221cm" svg:y2="8.364cm">
          <text:p/>
        </draw:line>
        <draw:line draw:style-name="gr18" draw:text-style-name="P2" draw:layer="layout" svg:x1="14.633cm" svg:y1="7.183cm" svg:x2="15.665cm" svg:y2="6.325cm">
          <text:p/>
        </draw:line>
        <draw:line draw:style-name="gr18" draw:text-style-name="P2" draw:layer="layout" svg:x1="17.334cm" svg:y1="7.309cm" svg:x2="16.49cm" svg:y2="6.426cm">
          <text:p/>
        </draw:line>
        <draw:custom-shape draw:style-name="gr16" draw:text-style-name="P2" draw:layer="layout" svg:width="4.064cm" svg:height="1.04cm" svg:x="20.344cm" svg:y="7.802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1" draw:text-style-name="P4" xml:id="id6" draw:id="id6" draw:layer="layout" svg:width="4.064cm" svg:height="1.04cm" svg:x="20.343cm" svg:y="8.801cm">
          <text:p text:style-name="P4">V[0] : </text:p>
          <draw:enhanced-geometry svg:viewBox="0 0 21600 21600" draw:type="rectangle" draw:enhanced-path="M 0 0 L 21600 0 21600 21600 0 21600 0 0 Z N"/>
        </draw:custom-shape>
        <draw:custom-shape draw:style-name="gr21" draw:text-style-name="P4" xml:id="id8" draw:id="id8" draw:layer="layout" svg:width="4.064cm" svg:height="1.04cm" svg:x="20.342cm" svg:y="9.8cm">
          <text:p text:style-name="P4">V[1] : 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0.803cm" svg:height="1.119cm" svg:x="24.662cm" svg:y="7.78cm">
          <draw:text-box>
            <text:p><text:span text:style-name="T18">r</text:span></text:p>
          </draw:text-box>
        </draw:frame>
        <draw:custom-shape draw:style-name="gr16" draw:text-style-name="P2" draw:layer="layout" svg:width="4.064cm" svg:height="1.04cm" svg:x="20.344cm" svg:y="11.202cm">
          <text:p text:style-name="P2">a, c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064cm" svg:height="1.04cm" svg:x="20.343cm" svg:y="12.201cm">
          <text:p text:style-name="P4">v[0] : </text:p>
          <draw:enhanced-geometry svg:viewBox="0 0 21600 21600" draw:type="rectangle" draw:enhanced-path="M 0 0 L 21600 0 21600 21600 0 21600 0 0 Z N"/>
        </draw:custom-shape>
        <draw:frame draw:style-name="gr17" draw:text-style-name="P9" xml:id="id9" draw:id="id9" draw:layer="layout" svg:width="0.976cm" svg:height="1.119cm" svg:x="24.662cm" svg:y="11.18cm">
          <draw:text-box>
            <text:p><text:span text:style-name="T18">q</text:span></text:p>
          </draw:text-box>
        </draw:frame>
        <draw:custom-shape draw:style-name="gr16" draw:text-style-name="P2" draw:layer="layout" svg:width="4.064cm" svg:height="1.04cm" svg:x="20.344cm" svg:y="13.603cm">
          <text:p text:style-name="P2">a, c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064cm" svg:height="1.04cm" svg:x="20.343cm" svg:y="14.602cm">
          <text:p text:style-name="P4">v[0] : 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0.976cm" svg:height="1.119cm" svg:x="24.662cm" svg:y="13.581cm">
          <draw:text-box>
            <text:p><text:span text:style-name="T18">q</text:span></text:p>
          </draw:text-box>
        </draw:frame>
        <draw:custom-shape draw:style-name="gr16" draw:text-style-name="P2" draw:layer="layout" svg:width="4.064cm" svg:height="1.04cm" svg:x="20.344cm" svg:y="16.004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064cm" svg:height="1.04cm" svg:x="20.343cm" svg:y="17.003cm">
          <text:p text:style-name="P4">v[0] : 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0.934cm" svg:height="1.119cm" svg:x="24.662cm" svg:y="15.982cm">
          <draw:text-box>
            <text:p><text:span text:style-name="T18">s</text:span></text:p>
          </draw:text-box>
        </draw:frame>
        <draw:custom-shape draw:style-name="gr16" draw:text-style-name="P2" draw:layer="layout" svg:width="4.064cm" svg:height="1.04cm" svg:x="20.344cm" svg:y="18.405cm">
          <text:p text:style-name="P2">a, b, c</text:p>
          <draw:enhanced-geometry svg:viewBox="0 0 21600 21600" draw:type="rectangle" draw:enhanced-path="M 0 0 L 21600 0 21600 21600 0 21600 0 0 Z N"/>
        </draw:custom-shape>
        <draw:frame draw:style-name="gr17" draw:text-style-name="P9" xml:id="id7" draw:id="id7" draw:layer="layout" svg:width="0.976cm" svg:height="1.119cm" svg:x="24.662cm" svg:y="18.383cm">
          <draw:text-box>
            <text:p><text:span text:style-name="T18">p</text:span></text:p>
          </draw:text-box>
        </draw:frame>
        <draw:frame draw:style-name="gr17" draw:text-style-name="P10" draw:layer="layout" svg:width="6.395cm" svg:height="0.962cm" svg:x="20.174cm" svg:y="5.326cm">
          <draw:text-box>
            <text:p><text:span text:style-name="T19">Stack di attivazione</text:span></text:p>
          </draw:text-box>
        </draw:frame>
        <draw:connector draw:style-name="gr18" draw:text-style-name="P2" draw:layer="layout" draw:line-skew="1.348cm" svg:x1="24.407cm" svg:y1="9.321cm" svg:x2="25.638cm" svg:y2="18.942cm" draw:start-shape="id6" draw:start-glue-point="1" draw:end-shape="id7" draw:end-glue-point="1" svg:d="m24407 9321h3079v9621h-1848" svg:viewBox="0 0 3080 9622">
          <text:p/>
        </draw:connector>
        <draw:connector draw:style-name="gr18" draw:text-style-name="P2" draw:layer="layout" svg:x1="24.406cm" svg:y1="15.172cm" svg:x2="27.509cm" svg:y2="15.154cm" svg:d="m24406 15172h1552v-18h1551" svg:viewBox="0 0 3104 19">
          <text:p/>
        </draw:connector>
        <draw:connector draw:style-name="gr18" draw:text-style-name="P2" draw:layer="layout" svg:x1="24.406cm" svg:y1="12.722cm" svg:x2="27.509cm" svg:y2="12.704cm" svg:d="m24406 12722h1552v-18h1551" svg:viewBox="0 0 3104 19">
          <text:p/>
        </draw:connector>
        <draw:connector draw:style-name="gr18" draw:text-style-name="P2" draw:layer="layout" draw:line-skew="0.84cm" svg:x1="24.406cm" svg:y1="10.32cm" svg:x2="25.638cm" svg:y2="11.739cm" draw:start-shape="id8" draw:start-glue-point="1" draw:end-shape="id9" draw:end-glue-point="1" svg:d="m24406 10320h2572v1419h-1340" svg:viewBox="0 0 2573 1420">
          <text:p/>
        </draw:connector>
        <draw:frame draw:style-name="gr17" draw:text-style-name="P11" draw:layer="layout" svg:width="12.224cm" svg:height="6.547cm" svg:x="7.974cm" svg:y="13.464cm">
          <draw:text-box>
            <text:p><text:span text:style-name="T20">Rappresentazione variabili non locali:</text:span></text:p>
            <text:p><text:span text:style-name="T20"><text:tab/></text:span><text:span text:style-name="T21">(</text:span><text:span text:style-name="T22">livello, offset</text:span><text:span text:style-name="T21">)</text:span></text:p>
            <text:p><text:span text:style-name="T20"/></text:p>
            <text:p><text:span text:style-name="T20">Nella procedura </text:span><text:span text:style-name="T23">r</text:span><text:span text:style-name="T24">:</text:span></text:p>
            <text:p><text:span text:style-name="T25">b</text:span><text:span text:style-name="T24"> è rappresentata da </text:span><text:span text:style-name="T25">(0,2)</text:span></text:p>
            <text:p><text:span text:style-name="T25">c </text:span><text:span text:style-name="T26">è rappresentata da</text:span><text:span text:style-name="T25"> (1,2)</text:span></text:p>
            <text:p><text:span text:style-name="T25"/></text:p>
            <text:p><text:span text:style-name="T25">env(x) = v[</text:span><text:span text:style-name="T27">livello</text:span><text:span text:style-name="T25">] + </text:span><text:span text:style-name="T27">offset</text:span><text:span text:style-name="T25"> </text:span></text:p>
          </draw:text-box>
        </draw:frame>
        <draw:connector draw:style-name="gr18" draw:text-style-name="P2" draw:layer="layout" svg:x1="24.406cm" svg:y1="17.622cm" svg:x2="27.509cm" svg:y2="17.604cm" svg:d="m24406 17622h1552v-18h1551" svg:viewBox="0 0 3104 19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1" draw:layer="layout" svg:width="25.199cm" svg:height="3.506cm" svg:x="1.4cm" svg:y="0.837cm" presentation:class="title" presentation:user-transformed="true">
          <draw:text-box>
            <text:p>Visibilità delle procedure</text:p>
          </draw:text-box>
        </draw:frame>
        <draw:frame draw:style-name="gr14" draw:text-style-name="P6" draw:layer="layout" svg:width="7.62cm" svg:height="12.127cm" svg:x="1.524cm" svg:y="5.588cm">
          <draw:text-box>
            <text:p><text:span text:style-name="T11">program</text:span><text:span text:style-name="T12"> </text:span><text:span text:style-name="T11">p</text:span><text:span text:style-name="T13">;</text:span></text:p>
            <text:p><text:span text:style-name="T13"><text:s text:c="3"/></text:span><text:span text:style-name="T13">var a,b,c int;</text:span></text:p>
            <text:p><text:span text:style-name="T13"/></text:p>
            <text:p><text:span text:style-name="T13"><text:tab/></text:span><text:span text:style-name="T11">procedure</text:span><text:span text:style-name="T12"> </text:span><text:span text:style-name="T11">q</text:span><text:span text:style-name="T14">;</text:span></text:p>
            <text:p><text:span text:style-name="T13"><text:s text:c="3"/></text:span><text:span text:style-name="T13">var a,c int;</text:span></text:p>
            <text:p><text:span text:style-name="T13"/></text:p>
            <text:p><text:span text:style-name="T13"><text:s text:c="6"/></text:span><text:span text:style-name="T11">procedure</text:span><text:span text:style-name="T12"> </text:span><text:span text:style-name="T11">r</text:span><text:span text:style-name="T14">;</text:span></text:p>
            <text:p><text:span text:style-name="T15"><text:s text:c="6"/></text:span><text:span text:style-name="T15">var a int;</text:span></text:p>
            <text:p><text:span text:style-name="T15"><text:s text:c="6"/></text:span><text:span text:style-name="T15">... </text:span></text:p>
            <text:p><text:span text:style-name="T15"><text:s text:c="3"/></text:span><text:span text:style-name="T15">... </text:span></text:p>
            <text:p><text:span text:style-name="T13"/></text:p>
            <text:p><text:span text:style-name="T15"><text:tab/></text:span><text:span text:style-name="T11">procedure</text:span><text:span text:style-name="T14"> </text:span><text:span text:style-name="T11">s</text:span><text:span text:style-name="T14">;</text:span></text:p>
            <text:p><text:span text:style-name="T13"><text:s text:c="3"/></text:span><text:span text:style-name="T13">var b int;</text:span></text:p>
            <text:p><text:span text:style-name="T15"><text:s text:c="3"/></text:span><text:span text:style-name="T15">... </text:span></text:p>
            <text:p><text:span text:style-name="T15">... </text:span></text:p>
            <text:p><text:span text:style-name="T13"/></text:p>
          </draw:text-box>
        </draw:frame>
        <draw:custom-shape draw:style-name="gr16" draw:text-style-name="P8" draw:layer="layout" svg:width="1.238cm" svg:height="1.181cm" svg:x="13.517cm" svg:y="7.183cm">
          <text:p text:style-name="P2"><text:span text:style-name="T17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238cm" svg:height="1.181cm" svg:x="15.385cm" svg:y="5.245cm">
          <text:p text:style-name="P2"><text:span text:style-name="T1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238cm" svg:height="1.181cm" svg:x="13.517cm" svg:y="9.741cm">
          <text:p text:style-name="P2"><text:span text:style-name="T17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238cm" svg:height="1.181cm" svg:x="17.334cm" svg:y="7.183cm">
          <text:p text:style-name="P2"><text:span text:style-name="T1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4.189cm" svg:height="0.962cm" svg:x="11.368cm" svg:y="5.424cm">
          <draw:text-box>
            <text:p>Liv. nesting 0</text:p>
          </draw:text-box>
        </draw:frame>
        <draw:frame draw:style-name="gr20" draw:layer="layout" svg:width="4.189cm" svg:height="0.962cm" svg:x="9.501cm" svg:y="7.362cm">
          <draw:text-box>
            <text:p>Liv. nesting 1</text:p>
          </draw:text-box>
        </draw:frame>
        <draw:frame draw:style-name="gr19" draw:layer="layout" svg:width="4.189cm" svg:height="0.962cm" svg:x="9.582cm" svg:y="9.997cm">
          <draw:text-box>
            <text:p>Liv. nesting 2</text:p>
          </draw:text-box>
        </draw:frame>
        <draw:line draw:style-name="gr18" draw:text-style-name="P2" draw:layer="layout" svg:x1="14.221cm" svg:y1="9.741cm" svg:x2="14.221cm" svg:y2="8.364cm">
          <text:p/>
        </draw:line>
        <draw:line draw:style-name="gr18" draw:text-style-name="P2" draw:layer="layout" svg:x1="14.633cm" svg:y1="7.183cm" svg:x2="15.665cm" svg:y2="6.325cm">
          <text:p/>
        </draw:line>
        <draw:line draw:style-name="gr18" draw:text-style-name="P2" draw:layer="layout" svg:x1="17.334cm" svg:y1="7.309cm" svg:x2="16.49cm" svg:y2="6.426cm">
          <text:p/>
        </draw:line>
        <draw:frame draw:style-name="gr22" draw:text-style-name="P13" draw:layer="layout" svg:width="10.344cm" svg:height="9.494cm" svg:x="16.96cm" svg:y="7.908cm">
          <draw:text-box>
            <text:p text:style-name="P12"><text:span text:style-name="T10">(Ambito statico)</text:span></text:p>
            <text:p><text:span text:style-name="T10"/></text:p>
            <text:p><text:span text:style-name="T28">F può chiamare G se:</text:span></text:p>
            <text:p><text:span text:style-name="T28"/></text:p>
            <text:list text:style-name="L2">
              <text:list-item>
                <text:p><text:span text:style-name="T10">G è definita in F</text:span></text:p>
              </text:list-item>
              <text:list-item>
                <text:p><text:span text:style-name="T10">G è definita in uno dei blocchi che contiene F</text:span></text:p>
                <text:p><text:span text:style-name="T10"/></text:p>
                <text:p><text:span text:style-name="T28">quindi:</text:span></text:p>
                <text:p><text:span text:style-name="T28"/></text:p>
              </text:list-item>
            </text:list>
            <text:p><text:span text:style-name="T28">F e G hanno sempre una parte di ambiente non locale in comu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layer="layout" svg:width="25.199cm" svg:height="3.506cm" svg:x="1.4cm" svg:y="0.837cm" presentation:class="title" presentation:user-transformed="true">
          <draw:text-box>
            <text:p>Mantenimento del vettore degli ambienti non locali</text:p>
          </draw:text-box>
        </draw:frame>
        <draw:frame draw:style-name="gr14" draw:text-style-name="P6" draw:layer="layout" svg:width="7.62cm" svg:height="12.127cm" svg:x="1.524cm" svg:y="5.588cm">
          <draw:text-box>
            <text:p><text:span text:style-name="T11">program</text:span><text:span text:style-name="T12"> </text:span><text:span text:style-name="T11">p</text:span><text:span text:style-name="T13">;</text:span></text:p>
            <text:p><text:span text:style-name="T13"><text:s text:c="3"/></text:span><text:span text:style-name="T13">var a,b,c int;</text:span></text:p>
            <text:p><text:span text:style-name="T13"/></text:p>
            <text:p><text:span text:style-name="T13"><text:tab/></text:span><text:span text:style-name="T11">procedure</text:span><text:span text:style-name="T12"> </text:span><text:span text:style-name="T11">q</text:span><text:span text:style-name="T14">;</text:span></text:p>
            <text:p><text:span text:style-name="T13"><text:s text:c="3"/></text:span><text:span text:style-name="T13">var a,c int;</text:span></text:p>
            <text:p><text:span text:style-name="T13"/></text:p>
            <text:p><text:span text:style-name="T13"><text:s text:c="6"/></text:span><text:span text:style-name="T11">procedure</text:span><text:span text:style-name="T12"> </text:span><text:span text:style-name="T11">r</text:span><text:span text:style-name="T14">;</text:span></text:p>
            <text:p><text:span text:style-name="T15"><text:s text:c="6"/></text:span><text:span text:style-name="T15">var a int;</text:span></text:p>
            <text:p><text:span text:style-name="T15"><text:s text:c="6"/></text:span><text:span text:style-name="T15">... </text:span></text:p>
            <text:p><text:span text:style-name="T15"><text:s text:c="3"/></text:span><text:span text:style-name="T15">... </text:span></text:p>
            <text:p><text:span text:style-name="T13"/></text:p>
            <text:p><text:span text:style-name="T15"><text:tab/></text:span><text:span text:style-name="T11">procedure</text:span><text:span text:style-name="T14"> </text:span><text:span text:style-name="T11">s</text:span><text:span text:style-name="T14">;</text:span></text:p>
            <text:p><text:span text:style-name="T13"><text:s text:c="3"/></text:span><text:span text:style-name="T13">var b int;</text:span></text:p>
            <text:p><text:span text:style-name="T15"><text:s text:c="3"/></text:span><text:span text:style-name="T15">... </text:span></text:p>
            <text:p><text:span text:style-name="T15">... </text:span></text:p>
            <text:p><text:span text:style-name="T13"/></text:p>
          </draw:text-box>
        </draw:frame>
        <draw:custom-shape draw:style-name="gr16" draw:text-style-name="P8" draw:layer="layout" svg:width="1.238cm" svg:height="1.181cm" svg:x="13.517cm" svg:y="7.183cm">
          <text:p text:style-name="P2"><text:span text:style-name="T17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238cm" svg:height="1.181cm" svg:x="15.385cm" svg:y="5.245cm">
          <text:p text:style-name="P2"><text:span text:style-name="T1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238cm" svg:height="1.181cm" svg:x="13.517cm" svg:y="9.741cm">
          <text:p text:style-name="P2"><text:span text:style-name="T17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238cm" svg:height="1.181cm" svg:x="17.334cm" svg:y="7.183cm">
          <text:p text:style-name="P2"><text:span text:style-name="T1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4.189cm" svg:height="0.962cm" svg:x="11.368cm" svg:y="5.424cm">
          <draw:text-box>
            <text:p>Liv. nesting 0</text:p>
          </draw:text-box>
        </draw:frame>
        <draw:frame draw:style-name="gr20" draw:layer="layout" svg:width="4.189cm" svg:height="0.962cm" svg:x="9.501cm" svg:y="7.362cm">
          <draw:text-box>
            <text:p>Liv. nesting 1</text:p>
          </draw:text-box>
        </draw:frame>
        <draw:frame draw:style-name="gr19" draw:layer="layout" svg:width="4.189cm" svg:height="0.962cm" svg:x="9.582cm" svg:y="9.997cm">
          <draw:text-box>
            <text:p>Liv. nesting 2</text:p>
          </draw:text-box>
        </draw:frame>
        <draw:line draw:style-name="gr18" draw:text-style-name="P2" draw:layer="layout" svg:x1="14.221cm" svg:y1="9.741cm" svg:x2="14.221cm" svg:y2="8.364cm">
          <text:p/>
        </draw:line>
        <draw:line draw:style-name="gr18" draw:text-style-name="P2" draw:layer="layout" svg:x1="14.633cm" svg:y1="7.183cm" svg:x2="15.665cm" svg:y2="6.325cm">
          <text:p/>
        </draw:line>
        <draw:line draw:style-name="gr18" draw:text-style-name="P2" draw:layer="layout" svg:x1="17.334cm" svg:y1="7.309cm" svg:x2="16.49cm" svg:y2="6.426cm">
          <text:p/>
        </draw:line>
        <draw:frame draw:style-name="gr17" draw:text-style-name="P13" draw:layer="layout" svg:width="12.402cm" svg:height="4.517cm" svg:x="9.006cm" svg:y="12.416cm">
          <draw:text-box>
            <text:p><text:span text:style-name="T10">Chiamata a procedure definite localmente:</text:span></text:p>
            <text:p><text:span text:style-name="T28"/></text:p>
            <text:p><text:span text:style-name="T28">Esempio 1: p chiama s:</text:span></text:p>
            <text:p><text:span text:style-name="T28"/></text:p>
            <text:list text:style-name="L2">
              <text:list-item>
                <text:p><text:span text:style-name="T29">Aumenta liv. di nesting</text:span></text:p>
              </text:list-item>
              <text:list-item>
                <text:p><text:span text:style-name="T29">Aggiungere elem. a v[ ]</text:span></text:p>
              </text:list-item>
            </text:list>
          </draw:text-box>
        </draw:frame>
        <draw:custom-shape draw:style-name="gr16" draw:text-style-name="P2" draw:layer="layout" svg:width="4.064cm" svg:height="1.04cm" svg:x="20.343cm" svg:y="16.004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064cm" svg:height="1.04cm" svg:x="20.342cm" svg:y="17.003cm">
          <text:p text:style-name="P4">v[0] : 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0.934cm" svg:height="1.119cm" svg:x="24.661cm" svg:y="15.982cm">
          <draw:text-box>
            <text:p><text:span text:style-name="T18">s</text:span></text:p>
          </draw:text-box>
        </draw:frame>
        <draw:custom-shape draw:style-name="gr16" draw:text-style-name="P2" draw:layer="layout" svg:width="4.064cm" svg:height="1.04cm" svg:x="20.343cm" svg:y="18.405cm">
          <text:p text:style-name="P2">a, b, c</text:p>
          <draw:enhanced-geometry svg:viewBox="0 0 21600 21600" draw:type="rectangle" draw:enhanced-path="M 0 0 L 21600 0 21600 21600 0 21600 0 0 Z N"/>
        </draw:custom-shape>
        <draw:frame draw:style-name="gr17" draw:text-style-name="P9" xml:id="id10" draw:id="id10" draw:layer="layout" svg:width="0.976cm" svg:height="1.119cm" svg:x="24.661cm" svg:y="18.383cm">
          <draw:text-box>
            <text:p><text:span text:style-name="T18">p</text:span></text:p>
          </draw:text-box>
        </draw:frame>
        <draw:connector draw:style-name="gr8" draw:text-style-name="P2" draw:layer="layout" draw:line-skew="0.787cm" svg:x1="24.405cm" svg:y1="17.622cm" svg:x2="25.637cm" svg:y2="18.942cm" draw:end-shape="id10" draw:end-glue-point="1" svg:d="m24405 17622h2519v1320h-1287" svg:viewBox="0 0 2520 1321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1" draw:layer="layout" svg:width="25.199cm" svg:height="3.506cm" svg:x="1.4cm" svg:y="0.837cm" presentation:class="title" presentation:user-transformed="true">
          <draw:text-box>
            <text:p>Mantenimento del vettore degli ambienti non locali</text:p>
          </draw:text-box>
        </draw:frame>
        <draw:frame draw:style-name="gr14" draw:text-style-name="P6" draw:layer="layout" svg:width="7.62cm" svg:height="12.127cm" svg:x="1.524cm" svg:y="5.588cm">
          <draw:text-box>
            <text:p><text:span text:style-name="T11">program</text:span><text:span text:style-name="T12"> </text:span><text:span text:style-name="T11">p</text:span><text:span text:style-name="T13">;</text:span></text:p>
            <text:p><text:span text:style-name="T13"><text:s text:c="3"/></text:span><text:span text:style-name="T13">var a,b,c int;</text:span></text:p>
            <text:p><text:span text:style-name="T13"/></text:p>
            <text:p><text:span text:style-name="T13"><text:tab/></text:span><text:span text:style-name="T11">procedure</text:span><text:span text:style-name="T12"> </text:span><text:span text:style-name="T11">q</text:span><text:span text:style-name="T14">;</text:span></text:p>
            <text:p><text:span text:style-name="T13"><text:s text:c="3"/></text:span><text:span text:style-name="T13">var a,c int;</text:span></text:p>
            <text:p><text:span text:style-name="T13"/></text:p>
            <text:p><text:span text:style-name="T13"><text:s text:c="6"/></text:span><text:span text:style-name="T11">procedure</text:span><text:span text:style-name="T12"> </text:span><text:span text:style-name="T11">r</text:span><text:span text:style-name="T14">;</text:span></text:p>
            <text:p><text:span text:style-name="T15"><text:s text:c="6"/></text:span><text:span text:style-name="T15">var a int;</text:span></text:p>
            <text:p><text:span text:style-name="T15"><text:s text:c="6"/></text:span><text:span text:style-name="T15">... </text:span></text:p>
            <text:p><text:span text:style-name="T15"><text:s text:c="3"/></text:span><text:span text:style-name="T15">... </text:span></text:p>
            <text:p><text:span text:style-name="T13"/></text:p>
            <text:p><text:span text:style-name="T15"><text:tab/></text:span><text:span text:style-name="T11">procedure</text:span><text:span text:style-name="T14"> </text:span><text:span text:style-name="T11">s</text:span><text:span text:style-name="T14">;</text:span></text:p>
            <text:p><text:span text:style-name="T13"><text:s text:c="3"/></text:span><text:span text:style-name="T13">var b int;</text:span></text:p>
            <text:p><text:span text:style-name="T15"><text:s text:c="3"/></text:span><text:span text:style-name="T15">... </text:span></text:p>
            <text:p><text:span text:style-name="T15">... </text:span></text:p>
            <text:p><text:span text:style-name="T13"/></text:p>
          </draw:text-box>
        </draw:frame>
        <draw:custom-shape draw:style-name="gr16" draw:text-style-name="P8" draw:layer="layout" svg:width="1.238cm" svg:height="1.181cm" svg:x="13.517cm" svg:y="7.183cm">
          <text:p text:style-name="P2"><text:span text:style-name="T17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238cm" svg:height="1.181cm" svg:x="15.385cm" svg:y="5.245cm">
          <text:p text:style-name="P2"><text:span text:style-name="T1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238cm" svg:height="1.181cm" svg:x="13.517cm" svg:y="9.741cm">
          <text:p text:style-name="P2"><text:span text:style-name="T17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238cm" svg:height="1.181cm" svg:x="17.334cm" svg:y="7.183cm">
          <text:p text:style-name="P2"><text:span text:style-name="T1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4.189cm" svg:height="0.962cm" svg:x="11.368cm" svg:y="5.424cm">
          <draw:text-box>
            <text:p>Liv. nesting 0</text:p>
          </draw:text-box>
        </draw:frame>
        <draw:frame draw:style-name="gr20" draw:layer="layout" svg:width="4.189cm" svg:height="0.962cm" svg:x="9.501cm" svg:y="7.362cm">
          <draw:text-box>
            <text:p>Liv. nesting 1</text:p>
          </draw:text-box>
        </draw:frame>
        <draw:frame draw:style-name="gr19" draw:layer="layout" svg:width="4.189cm" svg:height="0.962cm" svg:x="9.582cm" svg:y="9.997cm">
          <draw:text-box>
            <text:p>Liv. nesting 2</text:p>
          </draw:text-box>
        </draw:frame>
        <draw:line draw:style-name="gr18" draw:text-style-name="P2" draw:layer="layout" svg:x1="14.221cm" svg:y1="9.741cm" svg:x2="14.221cm" svg:y2="8.364cm">
          <text:p/>
        </draw:line>
        <draw:line draw:style-name="gr18" draw:text-style-name="P2" draw:layer="layout" svg:x1="14.633cm" svg:y1="7.183cm" svg:x2="15.665cm" svg:y2="6.325cm">
          <text:p/>
        </draw:line>
        <draw:line draw:style-name="gr18" draw:text-style-name="P2" draw:layer="layout" svg:x1="17.334cm" svg:y1="7.309cm" svg:x2="16.49cm" svg:y2="6.426cm">
          <text:p/>
        </draw:line>
        <draw:frame draw:style-name="gr17" draw:text-style-name="P13" draw:layer="layout" svg:width="12.402cm" svg:height="5.228cm" svg:x="9.006cm" svg:y="12.416cm">
          <draw:text-box>
            <text:p><text:span text:style-name="T10">Chiamata a procedure definite localmente:</text:span></text:p>
            <text:p><text:span text:style-name="T28"/></text:p>
            <text:p><text:span text:style-name="T28">Esempio 2: q chiama r:</text:span></text:p>
            <text:p><text:span text:style-name="T28"/></text:p>
            <text:list text:style-name="L2">
              <text:list-item>
                <text:p><text:span text:style-name="T29">Aumenta liv. di nesting</text:span></text:p>
              </text:list-item>
              <text:list-item>
                <text:p><text:span text:style-name="T29">Aggiungere elem. a v[ ]</text:span></text:p>
              </text:list-item>
              <text:list-item>
                <text:p><text:span text:style-name="T29">Copiare gli altri elementi</text:span></text:p>
              </text:list-item>
            </text:list>
          </draw:text-box>
        </draw:frame>
        <draw:custom-shape draw:style-name="gr16" draw:text-style-name="P2" draw:layer="layout" svg:width="4.064cm" svg:height="1.04cm" svg:x="20.322cm" svg:y="14.119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064cm" svg:height="1.04cm" svg:x="20.321cm" svg:y="15.118cm">
          <text:p text:style-name="P4">V[0] : </text:p>
          <draw:enhanced-geometry svg:viewBox="0 0 21600 21600" draw:type="rectangle" draw:enhanced-path="M 0 0 L 21600 0 21600 21600 0 21600 0 0 Z N"/>
        </draw:custom-shape>
        <draw:custom-shape draw:style-name="gr21" draw:text-style-name="P4" xml:id="id11" draw:id="id11" draw:layer="layout" svg:width="4.064cm" svg:height="1.04cm" svg:x="20.32cm" svg:y="16.117cm">
          <text:p text:style-name="P4">V[1] : 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0.803cm" svg:height="1.119cm" svg:x="24.64cm" svg:y="14.097cm">
          <draw:text-box>
            <text:p><text:span text:style-name="T18">r</text:span></text:p>
          </draw:text-box>
        </draw:frame>
        <draw:custom-shape draw:style-name="gr16" draw:text-style-name="P2" draw:layer="layout" svg:width="4.064cm" svg:height="1.04cm" svg:x="20.322cm" svg:y="17.519cm">
          <text:p text:style-name="P2">a, c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064cm" svg:height="1.04cm" svg:x="20.321cm" svg:y="18.518cm">
          <text:p text:style-name="P4">v[0] : </text:p>
          <draw:enhanced-geometry svg:viewBox="0 0 21600 21600" draw:type="rectangle" draw:enhanced-path="M 0 0 L 21600 0 21600 21600 0 21600 0 0 Z N"/>
        </draw:custom-shape>
        <draw:frame draw:style-name="gr17" draw:text-style-name="P9" xml:id="id12" draw:id="id12" draw:layer="layout" svg:width="0.976cm" svg:height="1.119cm" svg:x="24.64cm" svg:y="17.497cm">
          <draw:text-box>
            <text:p><text:span text:style-name="T18">q</text:span></text:p>
          </draw:text-box>
        </draw:frame>
        <draw:connector draw:style-name="gr8" draw:text-style-name="P2" draw:layer="layout" draw:line-skew="0.84cm" svg:x1="24.384cm" svg:y1="16.637cm" svg:x2="25.616cm" svg:y2="18.056cm" draw:start-shape="id11" draw:start-glue-point="1" draw:end-shape="id12" draw:end-glue-point="1" svg:d="m24384 16637h2572v1419h-1340" svg:viewBox="0 0 2573 1420">
          <text:p/>
        </draw:connector>
        <draw:line draw:style-name="gr23" draw:text-style-name="P14" draw:layer="layout" svg:x1="23.968cm" svg:y1="19.05cm" svg:x2="23.968cm" svg:y2="15.494cm">
          <text:p text:style-name="P2"><text:span text:style-name="T10">copia </text:span></text:p>
          <text:p text:style-name="P2"><text:span text:style-name="T10"/></text:p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1" draw:layer="layout" svg:width="25.199cm" svg:height="3.506cm" svg:x="1.4cm" svg:y="0.837cm" presentation:class="title" presentation:user-transformed="true">
          <draw:text-box>
            <text:p>Mantenimento del vettore degli ambienti non locali</text:p>
          </draw:text-box>
        </draw:frame>
        <draw:frame draw:style-name="gr14" draw:text-style-name="P6" draw:layer="layout" svg:width="7.62cm" svg:height="12.127cm" svg:x="1.524cm" svg:y="5.588cm">
          <draw:text-box>
            <text:p><text:span text:style-name="T11">program</text:span><text:span text:style-name="T12"> </text:span><text:span text:style-name="T11">p</text:span><text:span text:style-name="T13">;</text:span></text:p>
            <text:p><text:span text:style-name="T13"><text:s text:c="3"/></text:span><text:span text:style-name="T13">var a,b,c int;</text:span></text:p>
            <text:p><text:span text:style-name="T13"/></text:p>
            <text:p><text:span text:style-name="T13"><text:tab/></text:span><text:span text:style-name="T11">procedure</text:span><text:span text:style-name="T12"> </text:span><text:span text:style-name="T11">q</text:span><text:span text:style-name="T14">;</text:span></text:p>
            <text:p><text:span text:style-name="T13"><text:s text:c="3"/></text:span><text:span text:style-name="T13">var a,c int;</text:span></text:p>
            <text:p><text:span text:style-name="T13"/></text:p>
            <text:p><text:span text:style-name="T13"><text:s text:c="6"/></text:span><text:span text:style-name="T11">procedure</text:span><text:span text:style-name="T12"> </text:span><text:span text:style-name="T11">r</text:span><text:span text:style-name="T14">;</text:span></text:p>
            <text:p><text:span text:style-name="T15"><text:s text:c="6"/></text:span><text:span text:style-name="T15">var a int;</text:span></text:p>
            <text:p><text:span text:style-name="T15"><text:s text:c="6"/></text:span><text:span text:style-name="T15">... </text:span></text:p>
            <text:p><text:span text:style-name="T15"><text:s text:c="3"/></text:span><text:span text:style-name="T15">... </text:span></text:p>
            <text:p><text:span text:style-name="T13"/></text:p>
            <text:p><text:span text:style-name="T15"><text:tab/></text:span><text:span text:style-name="T11">procedure</text:span><text:span text:style-name="T14"> </text:span><text:span text:style-name="T11">s</text:span><text:span text:style-name="T14">;</text:span></text:p>
            <text:p><text:span text:style-name="T13"><text:s text:c="3"/></text:span><text:span text:style-name="T13">var b int;</text:span></text:p>
            <text:p><text:span text:style-name="T15"><text:s text:c="3"/></text:span><text:span text:style-name="T15">... </text:span></text:p>
            <text:p><text:span text:style-name="T15">... </text:span></text:p>
            <text:p><text:span text:style-name="T13"/></text:p>
          </draw:text-box>
        </draw:frame>
        <draw:custom-shape draw:style-name="gr16" draw:text-style-name="P8" draw:layer="layout" svg:width="1.238cm" svg:height="1.181cm" svg:x="13.517cm" svg:y="7.183cm">
          <text:p text:style-name="P2"><text:span text:style-name="T17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238cm" svg:height="1.181cm" svg:x="15.385cm" svg:y="5.245cm">
          <text:p text:style-name="P2"><text:span text:style-name="T1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238cm" svg:height="1.181cm" svg:x="13.517cm" svg:y="9.741cm">
          <text:p text:style-name="P2"><text:span text:style-name="T17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238cm" svg:height="1.181cm" svg:x="17.334cm" svg:y="7.183cm">
          <text:p text:style-name="P2"><text:span text:style-name="T1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4.189cm" svg:height="0.962cm" svg:x="11.368cm" svg:y="5.424cm">
          <draw:text-box>
            <text:p>Liv. nesting 0</text:p>
          </draw:text-box>
        </draw:frame>
        <draw:frame draw:style-name="gr20" draw:layer="layout" svg:width="4.189cm" svg:height="0.962cm" svg:x="9.501cm" svg:y="7.362cm">
          <draw:text-box>
            <text:p>Liv. nesting 1</text:p>
          </draw:text-box>
        </draw:frame>
        <draw:frame draw:style-name="gr19" draw:layer="layout" svg:width="4.189cm" svg:height="0.962cm" svg:x="9.582cm" svg:y="9.997cm">
          <draw:text-box>
            <text:p>Liv. nesting 2</text:p>
          </draw:text-box>
        </draw:frame>
        <draw:line draw:style-name="gr18" draw:text-style-name="P2" draw:layer="layout" svg:x1="14.221cm" svg:y1="9.741cm" svg:x2="14.221cm" svg:y2="8.364cm">
          <text:p/>
        </draw:line>
        <draw:line draw:style-name="gr18" draw:text-style-name="P2" draw:layer="layout" svg:x1="14.633cm" svg:y1="7.183cm" svg:x2="15.665cm" svg:y2="6.325cm">
          <text:p/>
        </draw:line>
        <draw:line draw:style-name="gr18" draw:text-style-name="P2" draw:layer="layout" svg:x1="17.334cm" svg:y1="7.309cm" svg:x2="16.49cm" svg:y2="6.426cm">
          <text:p/>
        </draw:line>
        <draw:frame draw:style-name="gr17" draw:text-style-name="P13" draw:layer="layout" svg:width="13.46cm" svg:height="4.517cm" svg:x="9.006cm" svg:y="12.416cm">
          <draw:text-box>
            <text:p><text:span text:style-name="T10">Chiamata a procedure definite </text:span><text:span text:style-name="T28">esternamente</text:span><text:span text:style-name="T10">:</text:span></text:p>
            <text:p><text:span text:style-name="T28"/></text:p>
            <text:p><text:span text:style-name="T28">Esempio 1: s chiama q:</text:span></text:p>
            <text:p><text:span text:style-name="T28"/></text:p>
            <text:list text:style-name="L2">
              <text:list-item>
                <text:p><text:span text:style-name="T29">stesso liv. di nesting</text:span></text:p>
              </text:list-item>
              <text:list-item>
                <text:p><text:span text:style-name="T29">Copiare gli elementi di v[ ]</text:span></text:p>
              </text:list-item>
            </text:list>
          </draw:text-box>
        </draw:frame>
        <draw:custom-shape draw:style-name="gr16" draw:text-style-name="P2" draw:layer="layout" svg:width="4.064cm" svg:height="1.04cm" svg:x="20.344cm" svg:y="14.003cm">
          <text:p text:style-name="P2">a, c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064cm" svg:height="1.04cm" svg:x="20.343cm" svg:y="15.002cm">
          <text:p text:style-name="P4">v[0] : 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0.976cm" svg:height="1.119cm" svg:x="24.662cm" svg:y="13.981cm">
          <draw:text-box>
            <text:p><text:span text:style-name="T18">q</text:span></text:p>
          </draw:text-box>
        </draw:frame>
        <draw:custom-shape draw:style-name="gr16" draw:text-style-name="P2" draw:layer="layout" svg:width="4.064cm" svg:height="1.04cm" svg:x="20.344cm" svg:y="16.404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064cm" svg:height="1.04cm" svg:x="20.343cm" svg:y="17.403cm">
          <text:p text:style-name="P4">v[0] : 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0.934cm" svg:height="1.119cm" svg:x="24.662cm" svg:y="16.382cm">
          <draw:text-box>
            <text:p><text:span text:style-name="T18">s</text:span></text:p>
          </draw:text-box>
        </draw:frame>
        <draw:line draw:style-name="gr23" draw:text-style-name="P14" draw:layer="layout" svg:x1="23.876cm" svg:y1="18.034cm" svg:x2="23.878cm" svg:y2="15.294cm">
          <text:p text:style-name="P2"><text:span text:style-name="T10">copia </text:span></text:p>
          <text:p text:style-name="P2"><text:span text:style-name="T10"/></text:p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1" draw:layer="layout" svg:width="25.199cm" svg:height="3.506cm" svg:x="1.4cm" svg:y="0.837cm" presentation:class="title" presentation:user-transformed="true">
          <draw:text-box>
            <text:p>Mantenimento del vettore degli ambienti non locali</text:p>
          </draw:text-box>
        </draw:frame>
        <draw:frame draw:style-name="gr14" draw:text-style-name="P6" draw:layer="layout" svg:width="7.62cm" svg:height="12.127cm" svg:x="1.524cm" svg:y="5.588cm">
          <draw:text-box>
            <text:p><text:span text:style-name="T11">program</text:span><text:span text:style-name="T12"> </text:span><text:span text:style-name="T11">p</text:span><text:span text:style-name="T13">;</text:span></text:p>
            <text:p><text:span text:style-name="T13"><text:s text:c="3"/></text:span><text:span text:style-name="T13">var a,b,c int;</text:span></text:p>
            <text:p><text:span text:style-name="T13"/></text:p>
            <text:p><text:span text:style-name="T13"><text:tab/></text:span><text:span text:style-name="T11">procedure</text:span><text:span text:style-name="T12"> </text:span><text:span text:style-name="T11">q</text:span><text:span text:style-name="T14">;</text:span></text:p>
            <text:p><text:span text:style-name="T13"><text:s text:c="3"/></text:span><text:span text:style-name="T13">var a,c int;</text:span></text:p>
            <text:p><text:span text:style-name="T13"/></text:p>
            <text:p><text:span text:style-name="T13"><text:s text:c="6"/></text:span><text:span text:style-name="T11">procedure</text:span><text:span text:style-name="T12"> </text:span><text:span text:style-name="T11">r</text:span><text:span text:style-name="T14">;</text:span></text:p>
            <text:p><text:span text:style-name="T15"><text:s text:c="6"/></text:span><text:span text:style-name="T15">var a int;</text:span></text:p>
            <text:p><text:span text:style-name="T15"><text:s text:c="6"/></text:span><text:span text:style-name="T15">... </text:span></text:p>
            <text:p><text:span text:style-name="T15"><text:s text:c="3"/></text:span><text:span text:style-name="T15">... </text:span></text:p>
            <text:p><text:span text:style-name="T13"/></text:p>
            <text:p><text:span text:style-name="T15"><text:tab/></text:span><text:span text:style-name="T11">procedure</text:span><text:span text:style-name="T14"> </text:span><text:span text:style-name="T11">s</text:span><text:span text:style-name="T14">;</text:span></text:p>
            <text:p><text:span text:style-name="T13"><text:s text:c="3"/></text:span><text:span text:style-name="T13">var b int;</text:span></text:p>
            <text:p><text:span text:style-name="T15"><text:s text:c="3"/></text:span><text:span text:style-name="T15">... </text:span></text:p>
            <text:p><text:span text:style-name="T15">... </text:span></text:p>
            <text:p><text:span text:style-name="T13"/></text:p>
          </draw:text-box>
        </draw:frame>
        <draw:custom-shape draw:style-name="gr16" draw:text-style-name="P8" draw:layer="layout" svg:width="1.238cm" svg:height="1.181cm" svg:x="13.517cm" svg:y="7.183cm">
          <text:p text:style-name="P2"><text:span text:style-name="T17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238cm" svg:height="1.181cm" svg:x="15.385cm" svg:y="5.245cm">
          <text:p text:style-name="P2"><text:span text:style-name="T1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238cm" svg:height="1.181cm" svg:x="13.517cm" svg:y="9.741cm">
          <text:p text:style-name="P2"><text:span text:style-name="T17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238cm" svg:height="1.181cm" svg:x="17.334cm" svg:y="7.183cm">
          <text:p text:style-name="P2"><text:span text:style-name="T1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4.189cm" svg:height="0.962cm" svg:x="11.368cm" svg:y="5.424cm">
          <draw:text-box>
            <text:p>Liv. nesting 0</text:p>
          </draw:text-box>
        </draw:frame>
        <draw:frame draw:style-name="gr20" draw:layer="layout" svg:width="4.189cm" svg:height="0.962cm" svg:x="9.501cm" svg:y="7.362cm">
          <draw:text-box>
            <text:p>Liv. nesting 1</text:p>
          </draw:text-box>
        </draw:frame>
        <draw:frame draw:style-name="gr19" draw:layer="layout" svg:width="4.189cm" svg:height="0.962cm" svg:x="9.582cm" svg:y="9.997cm">
          <draw:text-box>
            <text:p>Liv. nesting 2</text:p>
          </draw:text-box>
        </draw:frame>
        <draw:line draw:style-name="gr18" draw:text-style-name="P2" draw:layer="layout" svg:x1="14.221cm" svg:y1="9.741cm" svg:x2="14.221cm" svg:y2="8.364cm">
          <text:p/>
        </draw:line>
        <draw:line draw:style-name="gr18" draw:text-style-name="P2" draw:layer="layout" svg:x1="14.633cm" svg:y1="7.183cm" svg:x2="15.665cm" svg:y2="6.325cm">
          <text:p/>
        </draw:line>
        <draw:line draw:style-name="gr18" draw:text-style-name="P2" draw:layer="layout" svg:x1="17.334cm" svg:y1="7.309cm" svg:x2="16.49cm" svg:y2="6.426cm">
          <text:p/>
        </draw:line>
        <draw:frame draw:style-name="gr17" draw:text-style-name="P13" draw:layer="layout" svg:width="13.81cm" svg:height="8.072cm" svg:x="9.006cm" svg:y="12.416cm">
          <draw:text-box>
            <text:p><text:span text:style-name="T10">Chiamata a procedure definite esternamente:</text:span></text:p>
            <text:p><text:span text:style-name="T28"/></text:p>
            <text:p><text:span text:style-name="T28">Esempio 2: r chiama s:</text:span></text:p>
            <text:p><text:span text:style-name="T28"/></text:p>
            <text:list text:style-name="L2">
              <text:list-item>
                <text:p><text:span text:style-name="T29">il liv. di nesting </text:span><text:span text:style-name="T28">decresce</text:span></text:p>
              </text:list-item>
              <text:list-item>
                <text:p><text:span text:style-name="T29">Copiare solo gli elementi di livello </text:span></text:p>
                <text:p><text:span text:style-name="T30">minore o uguale </text:span><text:span text:style-name="T29">a quello di s</text:span></text:p>
              </text:list-item>
              <text:list-item>
                <text:p><text:span text:style-name="T29">Struttura ad albero + scoping statico </text:span></text:p>
                <text:p><text:span text:style-name="T29">garantiscono sempre di trovare </text:span></text:p>
                <text:p><text:span text:style-name="T29">l'ambiente non locale della </text:span></text:p>
                <text:p><text:span text:style-name="T29">procedura chiamata nel record del chiamante</text:span></text:p>
              </text:list-item>
            </text:list>
          </draw:text-box>
        </draw:frame>
        <draw:custom-shape draw:style-name="gr16" draw:text-style-name="P2" draw:layer="layout" svg:width="4.064cm" svg:height="1.04cm" svg:x="20.344cm" svg:y="14.003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064cm" svg:height="1.04cm" svg:x="20.343cm" svg:y="15.002cm">
          <text:p text:style-name="P4">v[0] : 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0.934cm" svg:height="1.119cm" svg:x="24.662cm" svg:y="13.981cm">
          <draw:text-box>
            <text:p><text:span text:style-name="T18">s</text:span></text:p>
          </draw:text-box>
        </draw:frame>
        <draw:custom-shape draw:style-name="gr16" draw:text-style-name="P2" draw:layer="layout" svg:width="4.064cm" svg:height="1.04cm" svg:x="20.344cm" svg:y="16.404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064cm" svg:height="1.04cm" svg:x="20.343cm" svg:y="17.403cm">
          <text:p text:style-name="P4">v[0] : 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0.803cm" svg:height="1.119cm" svg:x="24.662cm" svg:y="16.382cm">
          <draw:text-box>
            <text:p><text:span text:style-name="T18">r</text:span></text:p>
          </draw:text-box>
        </draw:frame>
        <draw:line draw:style-name="gr23" draw:text-style-name="P14" draw:layer="layout" svg:x1="23.876cm" svg:y1="18.034cm" svg:x2="23.878cm" svg:y2="15.294cm">
          <text:p text:style-name="P2"><text:span text:style-name="T10">copia </text:span></text:p>
          <text:p text:style-name="P2"><text:span text:style-name="T10"/></text:p>
        </draw:line>
        <draw:custom-shape draw:style-name="gr21" draw:text-style-name="P4" draw:layer="layout" svg:width="4.064cm" svg:height="1.04cm" svg:x="20.32cm" svg:y="18.426cm">
          <text:p text:style-name="P4">V[1] :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roprietà di questa implementazione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3">
              <text:list-item>
                <text:p>Accesso alle variabili in tempo costante</text:p>
                <text:list>
                  <text:list-item>
                    <text:p>Accesso a vettore + somma del puntatore ivi contenuto e dell'offset</text:p>
                  </text:list-item>
                  <text:list-item>
                    <text:p>Indipendente dai livelli di nesting</text:p>
                  </text:list-item>
                  <text:list-item>
                    <text:p>Calcolo supportato direttamente dalle istruzioni macchina</text:p>
                  </text:list-item>
                </text:list>
              </text:list-item>
              <text:list-item>
                <text:p>Creazione record di attivazione lineare nel livello di nesting (copia degli elementi di v[ ])</text:p>
                <text:list>
                  <text:list-item>
                    <text:p>Indipendente dall'esecuzione</text:p>
                  </text:list-item>
                  <text:list-item>
                    <text:p>Dipende solo dal testo del sorgente</text:p>
                  </text:list-item>
                </text:list>
              </text:list-item>
              <text:list-item>
                <text:p>Tempo <text:span text:style-name="T10">costante</text:span></text:p>
              </text:list-item>
              <text:list-item>
                <text:p><text:span text:style-name="T31">L'implementazione naïve richiederebbe a run time di percorrere le liste di puntatori all'ambiente non locale</text:span></text:p>
                <text:list>
                  <text:list-item>
                    <text:p><text:span text:style-name="T31">Accesso alle variabili in tempo </text:span><text:span text:style-name="T32">lineare</text:span><text:span text:style-name="T31"> nel livello di nesting</text:span></text:p>
                  </text:list-item>
                  <text:list-item>
                    <text:p><text:span text:style-name="T31">Creazione dei record di attivazione in tempo </text:span><text:span text:style-name="T32">lineare</text:span><text:span text:style-name="T31"> nel livello di n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 Bonatti</meta:initial-creator>
    <meta:creation-date>2014-03-19T08:15:14</meta:creation-date>
    <dc:date>2015-05-27T08:09:11</dc:date>
    <dc:creator>P Bonatti</dc:creator>
    <meta:editing-duration>PT4H5M31S</meta:editing-duration>
    <meta:editing-cycles>25</meta:editing-cycles>
    <meta:generator>LibreOffice/3.5$Linux_x86 LibreOffice_project/350m1$Build-2</meta:generator>
    <meta:document-statistic meta:object-count="210"/>
  </office:meta>
</office:document-meta>
</file>