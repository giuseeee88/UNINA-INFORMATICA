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dwaita Mono" fo:font-size="8pt" officeooo:rsid="0004c019" officeooo:paragraph-rsid="0004c019" style:font-size-asian="8pt" style:font-size-complex="8pt"/>
    </style:style>
    <style:style style:name="P2" style:family="paragraph" style:parent-style-name="Quotations">
      <style:text-properties officeooo:rsid="0004c019"/>
    </style:style>
    <style:style style:name="P3" style:family="paragraph" style:parent-style-name="Standard">
      <style:text-properties officeooo:rsid="0004c019" officeooo:paragraph-rsid="0004c019"/>
    </style:style>
    <style:style style:name="P4" style:family="paragraph" style:parent-style-name="Text_20_body">
      <style:text-properties style:font-name="Adwaita Mono" fo:font-size="8pt" officeooo:rsid="0004c019" style:font-size-asian="8pt" style:font-size-complex="8pt"/>
    </style:style>
    <style:style style:name="P5" style:family="paragraph" style:parent-style-name="Standard">
      <style:text-properties style:font-name="Adwaita Mono" fo:font-size="8pt" officeooo:rsid="0004c019" officeooo:paragraph-rsid="000fae7e" style:font-size-asian="8pt" style:font-size-complex="8pt"/>
    </style:style>
    <style:style style:name="P6" style:family="paragraph" style:parent-style-name="Text_20_body">
      <style:text-properties officeooo:rsid="0004c019"/>
    </style:style>
    <style:style style:name="P7" style:family="paragraph" style:parent-style-name="Standard">
      <style:text-properties style:font-name="Adwaita Mono" fo:font-size="8pt" officeooo:rsid="000621e9" officeooo:paragraph-rsid="000621e9" style:font-size-asian="8pt" style:font-size-complex="8pt"/>
    </style:style>
    <style:style style:name="P8" style:family="paragraph" style:parent-style-name="Standard">
      <style:text-properties officeooo:rsid="0006bce3" officeooo:paragraph-rsid="000d1079" fo:background-color="#00a933"/>
    </style:style>
    <style:style style:name="P9" style:family="paragraph" style:parent-style-name="Standard">
      <style:text-properties officeooo:paragraph-rsid="000621e9"/>
    </style:style>
    <style:style style:name="P10" style:family="paragraph" style:parent-style-name="Text_20_body">
      <style:text-properties officeooo:paragraph-rsid="000621e9"/>
    </style:style>
    <style:style style:name="P11" style:family="paragraph" style:parent-style-name="Text_20_body" style:list-style-name="L1"/>
    <style:style style:name="P12" style:family="paragraph" style:parent-style-name="Standard">
      <style:text-properties officeooo:paragraph-rsid="000d1079"/>
    </style:style>
    <style:style style:name="P13" style:family="paragraph" style:parent-style-name="Standard">
      <style:text-properties officeooo:paragraph-rsid="0006bce3"/>
    </style:style>
    <style:style style:name="P14" style:family="paragraph" style:parent-style-name="Standard">
      <style:text-properties officeooo:paragraph-rsid="00089d1e"/>
    </style:style>
    <style:style style:name="P15" style:family="paragraph" style:parent-style-name="Standard">
      <style:text-properties officeooo:paragraph-rsid="000e096d"/>
    </style:style>
    <style:style style:name="P16" style:family="paragraph" style:parent-style-name="Standard">
      <style:text-properties style:font-name="Adwaita Mono" fo:font-size="8pt" officeooo:paragraph-rsid="00089d1e" style:font-size-asian="8pt" style:font-size-complex="8pt"/>
    </style:style>
    <style:style style:name="P17" style:family="paragraph" style:parent-style-name="Standard">
      <style:text-properties style:font-name="Adwaita Mono" fo:font-size="8pt" officeooo:paragraph-rsid="000d1079" style:font-size-asian="8pt" style:font-size-complex="8pt"/>
    </style:style>
    <style:style style:name="P18" style:family="paragraph" style:parent-style-name="Standard">
      <style:paragraph-properties style:writing-mode="lr-tb" style:writing-mode-automatic="false"/>
      <style:text-properties officeooo:paragraph-rsid="000d1079"/>
    </style:style>
    <style:style style:name="P19" style:family="paragraph" style:parent-style-name="Standard">
      <style:text-properties officeooo:paragraph-rsid="000d1079" fo:background-color="#00a933"/>
    </style:style>
    <style:style style:name="P20" style:family="paragraph" style:parent-style-name="Standard">
      <style:text-properties officeooo:paragraph-rsid="000a17b1"/>
    </style:style>
    <style:style style:name="P21" style:family="paragraph" style:parent-style-name="Standard">
      <style:text-properties officeooo:paragraph-rsid="00107e75"/>
    </style:style>
    <style:style style:name="P22" style:family="paragraph" style:parent-style-name="Standard">
      <style:paragraph-properties style:writing-mode="lr-tb" style:writing-mode-automatic="false"/>
      <style:text-properties officeooo:paragraph-rsid="000e096d"/>
    </style:style>
    <style:style style:name="P23" style:family="paragraph" style:parent-style-name="Standard">
      <style:paragraph-properties style:writing-mode="lr-tb" style:writing-mode-automatic="false"/>
      <style:text-properties officeooo:paragraph-rsid="000fae7e"/>
    </style:style>
    <style:style style:name="P24" style:family="paragraph" style:parent-style-name="Heading_20_3">
      <style:paragraph-properties style:writing-mode="lr-tb" style:writing-mode-automatic="false"/>
      <style:text-properties officeooo:paragraph-rsid="000fae7e"/>
    </style:style>
    <style:style style:name="P25" style:family="paragraph" style:parent-style-name="Text_20_body">
      <style:text-properties style:font-name="Adwaita Mono" fo:font-size="8pt" style:font-size-asian="8pt" style:font-size-complex="8pt"/>
    </style:style>
    <style:style style:name="P26" style:family="paragraph" style:parent-style-name="Text_20_body" style:list-style-name="L2"/>
    <style:style style:name="P27" style:family="paragraph" style:parent-style-name="Heading_20_3">
      <style:text-properties style:font-name="Adwaita Mono" fo:font-size="8pt" style:font-size-asian="8pt" style:font-size-complex="8pt"/>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text-properties style:font-name="Adwaita Mono" fo:font-size="8pt" style:font-size-asian="8pt" style:font-size-complex="8pt"/>
    </style:style>
    <style:style style:name="P31" style:family="paragraph" style:parent-style-name="Text_20_body" style:list-style-name="L5"/>
    <style:style style:name="P32" style:family="paragraph" style:parent-style-name="Text_20_body" style:list-style-name="L5">
      <style:text-properties style:font-name="Adwaita Mono" fo:font-size="8pt" style:font-size-asian="8pt" style:font-size-complex="8pt"/>
    </style:style>
    <style:style style:name="P33" style:family="paragraph" style:parent-style-name="Text_20_body" style:list-style-name="L6">
      <style:text-properties style:font-name="Adwaita Mono" fo:font-size="8pt" style:font-size-asian="8pt" style:font-size-complex="8pt"/>
    </style:style>
    <style:style style:name="P34" style:family="paragraph" style:parent-style-name="Text_20_body" style:list-style-name="L6"/>
    <style:style style:name="P35" style:family="paragraph" style:parent-style-name="Horizontal_20_Line">
      <style:text-properties style:font-name="Adwaita Mono" fo:font-size="8pt" style:font-size-asian="8pt" style:font-size-complex="8pt"/>
    </style:style>
    <style:style style:name="P36" style:family="paragraph" style:parent-style-name="Text_20_body">
      <style:text-properties style:font-name="Adwaita Mono" fo:font-size="8pt" fo:font-weight="bold" style:font-size-asian="8pt" style:font-size-complex="8pt"/>
    </style:style>
    <style:style style:name="P37" style:family="paragraph" style:parent-style-name="Text_20_body" style:list-style-name="L7"/>
    <style:style style:name="P38" style:family="paragraph" style:parent-style-name="Text_20_body" style:list-style-name="L7">
      <style:text-properties style:font-name="Adwaita Mono" fo:font-size="8pt" style:font-size-asian="8pt" style:font-size-complex="8pt"/>
    </style:style>
    <style:style style:name="T1" style:family="text">
      <style:text-properties fo:font-weight="bold"/>
    </style:style>
    <style:style style:name="T2" style:family="text">
      <style:text-properties style:font-name="Adwaita Mono" fo:font-size="8pt" style:font-size-asian="8pt" style:font-size-complex="8pt"/>
    </style:style>
    <style:style style:name="T3" style:family="text">
      <style:text-properties style:font-name="Adwaita Mono" fo:font-size="8pt" fo:font-style="italic" style:font-size-asian="8pt" style:font-size-complex="8pt"/>
    </style:style>
    <style:style style:name="T4" style:family="text">
      <style:text-properties style:font-name="Adwaita Mono" fo:font-size="8pt" fo:font-weight="bold" style:font-size-asian="8pt" style:font-size-complex="8pt"/>
    </style:style>
    <style:style style:name="T5" style:family="text">
      <style:text-properties fo:font-style="italic"/>
    </style:style>
    <style:style style:name="T6" style:family="text">
      <style:text-properties style:font-name="Adwaita Mono" fo:font-size="8pt" officeooo:rsid="000d1079" style:font-size-asian="8pt" style:font-size-complex="8pt"/>
    </style:style>
    <style:style style:name="T7" style:family="text">
      <style:text-properties style:font-name="Adwaita Mono" fo:font-size="8pt" officeooo:rsid="000621e9" fo:background-color="#ffff00" loext:char-shading-value="0" style:font-size-asian="8pt" style:font-size-complex="8pt"/>
    </style:style>
    <style:style style:name="T8" style:family="text">
      <style:text-properties style:font-name="Adwaita Mono" fo:font-size="8pt" officeooo:rsid="000621e9" style:font-size-asian="8pt" style:font-size-complex="8pt"/>
    </style:style>
    <style:style style:name="T9" style:family="text">
      <style:text-properties style:font-name="Adwaita Mono" fo:font-size="8pt" fo:background-color="#ffff00" loext:char-shading-value="0" style:font-size-asian="8pt" style:font-size-complex="8pt"/>
    </style:style>
    <style:style style:name="T10" style:family="text">
      <style:text-properties fo:color="#bf0041" loext:opacity="100%" style:font-name="Adwaita Mono" fo:font-size="8pt" style:font-size-asian="8pt" style:font-size-complex="8pt"/>
    </style:style>
    <style:style style:name="T11" style:family="text">
      <style:text-properties style:font-name="Adwaita Mono" fo:font-size="8pt" fo:font-style="italic" fo:font-weight="bold" style:font-size-asian="8pt" style:font-size-complex="8pt"/>
    </style:style>
    <style:style style:name="T12" style:family="text">
      <style:text-properties style:font-name="Adwaita Mono" fo:font-size="8pt" fo:font-weight="bold" officeooo:rsid="000621e9" style:font-size-asian="8pt" style:font-size-complex="8pt"/>
    </style:style>
    <style:style style:name="T13" style:family="text">
      <style:text-properties style:font-name="Adwaita Mono" fo:font-size="8pt" fo:background-color="#00a933" loext:char-shading-value="0" style:font-size-asian="8pt" style:font-size-complex="8pt"/>
    </style:style>
    <style:style style:name="T14" style:family="text">
      <style:text-properties style:font-name="Adwaita Mono" fo:font-size="8pt" officeooo:rsid="000d1079" fo:background-color="#00a933" loext:char-shading-value="0" style:font-size-asian="8pt" style:font-size-complex="8pt"/>
    </style:style>
    <style:style style:name="T15" style:family="text">
      <style:text-properties style:font-name="Adwaita Mono" fo:font-size="8pt" officeooo:rsid="0006bce3" style:font-size-asian="8pt" style:font-size-complex="8pt"/>
    </style:style>
    <style:style style:name="T16" style:family="text">
      <style:text-properties style:font-name="Adwaita Mono" fo:font-size="8pt" officeooo:rsid="00089d1e" style:font-size-asian="8pt" style:font-size-complex="8pt"/>
    </style:style>
    <style:style style:name="T17" style:family="text">
      <style:text-properties style:font-name="Adwaita Mono" fo:font-size="8pt" officeooo:rsid="000d1079" fo:background-color="transparent" loext:char-shading-value="0" style:font-size-asian="8pt" style:font-size-complex="8pt"/>
    </style:style>
    <style:style style:name="T18" style:family="text">
      <style:text-properties style:font-name="Adwaita Mono" fo:font-size="8pt" officeooo:rsid="000a17b1" style:font-size-asian="8pt" style:font-size-complex="8pt"/>
    </style:style>
    <style:style style:name="T19" style:family="text">
      <style:text-properties style:font-name="Adwaita Mono" fo:font-size="8pt" fo:background-color="transparent" loext:char-shading-value="0" style:font-size-asian="8pt" style:font-size-complex="8pt"/>
    </style:style>
    <style:style style:name="T20" style:family="text">
      <style:text-properties style:font-name="Adwaita Mono" fo:font-size="8pt" fo:font-style="italic" fo:background-color="transparent" loext:char-shading-value="0" style:font-size-asian="8pt" style:font-size-complex="8pt"/>
    </style:style>
    <style:style style:name="T21" style:family="text">
      <style:text-properties style:font-name="Adwaita Mono" fo:font-size="8pt" fo:font-weight="bold" fo:background-color="transparent" loext:char-shading-value="0" style:font-size-asian="8pt" style:font-size-complex="8pt"/>
    </style:style>
    <style:style style:name="T22" style:family="text">
      <style:text-properties style:font-name="Adwaita Mono" fo:font-size="8pt" officeooo:rsid="000a17b1" fo:background-color="transparent" loext:char-shading-value="0" style:font-size-asian="8pt" style:font-size-complex="8pt"/>
    </style:style>
    <style:style style:name="T23" style:family="text">
      <style:text-properties style:font-name="Adwaita Mono" fo:font-size="8pt" fo:font-weight="bold" officeooo:rsid="000a17b1" fo:background-color="transparent" loext:char-shading-value="0" style:font-size-asian="8pt" style:font-size-complex="8pt"/>
    </style:style>
    <style:style style:name="T24" style:family="text">
      <style:text-properties style:font-name="Adwaita Mono" fo:font-size="8pt" officeooo:rsid="00107e75" fo:background-color="#00a933" loext:char-shading-value="0" style:font-size-asian="8pt" style:font-size-complex="8pt"/>
    </style:style>
    <style:style style:name="T25" style:family="text">
      <style:text-properties style:font-name="Adwaita Mono" fo:font-size="8pt" officeooo:rsid="00107e75" style:font-size-asian="8pt" style:font-size-complex="8pt"/>
    </style:style>
    <style:style style:name="T26" style:family="text">
      <style:text-properties style:font-name="Adwaita Mono" fo:font-size="8pt" officeooo:rsid="00107e75" fo:background-color="transparent" loext:char-shading-value="0" style:font-size-asian="8pt" style:font-size-complex="8pt"/>
    </style:style>
    <style:style style:name="T27" style:family="text">
      <style:text-properties style:font-name="Adwaita Mono" fo:font-size="8pt" fo:font-weight="bold" officeooo:rsid="00107e75" fo:background-color="#ff0000" loext:char-shading-value="0" style:font-size-asian="8pt" style:font-weight-asian="bold" style:font-size-complex="8pt" style:font-weight-complex="bold"/>
    </style:style>
    <style:style style:name="T28" style:family="text">
      <style:text-properties fo:font-size="8pt" officeooo:rsid="00107e75" fo:background-color="transparent" loext:char-shading-value="0" style:font-size-asian="8pt" style:font-size-complex="8pt"/>
    </style:style>
    <style:style style:name="T29" style:family="text">
      <style:text-properties style:font-name="Adwaita Mono" fo:font-size="8pt" officeooo:rsid="000e096d" fo:background-color="#729fcf" loext:char-shading-value="0" style:font-size-asian="8pt" style:font-size-complex="8pt"/>
    </style:style>
    <style:style style:name="T30" style:family="text">
      <style:text-properties style:font-name="Adwaita Mono" fo:font-size="8pt" officeooo:rsid="000e096d" style:font-size-asian="8pt" style:font-size-complex="8pt"/>
    </style:style>
    <style:style style:name="T31" style:family="text">
      <style:text-properties style:font-name="Adwaita Mono" fo:font-size="8pt" officeooo:rsid="000fae7e" style:font-size-asian="8pt" style:font-size-complex="8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e teoria:</text:p>
      <text:p text:style-name="P1"><text:tab/></text:p>
      <text:p text:style-name="P1"><text:tab/><text:span text:style-name="T1">1. Gestione degli Eventi in Java Swing (GUI)</text:span></text:p>
      <text:p text:style-name="P2"><text:span text:style-name="T2">"In Java Swing, la gestione delle azioni dell'utente avviene tramite i 'Gestori di Eventi'. Quando viene avviato il programma, la Java Virtual Machine avvia un loop infinito che mantiene l'interfaccia reattiva. Il programmatore può definire quali elementi (es. bottoni) sono sensibili agli eventi aggiungendo un </text:span><text:span text:style-name="T3">Listener</text:span><text:span text:style-name="T2"> (ad esempio </text:span><text:span text:style-name="Source_20_Text"><text:span text:style-name="T2">bottone.addActionListener(new ActionListener())</text:span></text:span><text:span text:style-name="T2">). In questo modo, quando l'evento si verifica, la JVM attiva in automatico il metodo specifico (es. </text:span><text:span text:style-name="Source_20_Text"><text:span text:style-name="T2">actionPerformed</text:span></text:span><text:span text:style-name="T2">) associato a quel controllo."</text:span></text:p>
      <text:p text:style-name="P3"><text:span text:style-name="T2"><text:tab/></text:span><text:span text:style-name="T4">2. Operatore </text:span><text:span text:style-name="Source_20_Text"><text:span text:style-name="T4">==</text:span></text:span><text:span text:style-name="T4"> vs metodo </text:span><text:span text:style-name="Source_20_Text"><text:span text:style-name="T4">.equals()</text:span></text:span></text:p>
      <text:p text:style-name="P2"><text:span text:style-name="T2">"La differenza fondamentale risiede in cosa viene confrontato. L'operatore </text:span><text:span text:style-name="Source_20_Text"><text:span text:style-name="T2">==</text:span></text:span><text:span text:style-name="T2"> applicato ai tipi primitivi (int, double, ecc.) confronta direttamente il loro valore. Quando </text:span><text:span text:style-name="Source_20_Text"><text:span text:style-name="T2">==</text:span></text:span><text:span text:style-name="T2"> è applicato agli Oggetti (come le Stringhe), esso confronta invece gli </text:span><text:span text:style-name="T3">indirizzi di memoria</text:span><text:span text:style-name="T2"> (i puntatori). Per confrontare il contenuto testuale o logico di due oggetti, è necessario utilizzare il metodo </text:span><text:span text:style-name="Source_20_Text"><text:span text:style-name="T2">.equals()</text:span></text:span><text:span text:style-name="T2">, che è specifico per gli oggetti e valuta l'uguaglianza del loro contenuto interno."</text:span></text:p>
      <text:p text:style-name="P1"/>
      <text:p text:style-name="P3"><text:span text:style-name="T2"><text:tab/></text:span><text:span text:style-name="T4">3. Gestione Eccezioni (</text:span><text:span text:style-name="Source_20_Text"><text:span text:style-name="T4">throw</text:span></text:span><text:span text:style-name="T4">, </text:span><text:span text:style-name="Source_20_Text"><text:span text:style-name="T4">throws</text:span></text:span><text:span text:style-name="T4">, try-catch)</text:span></text:p>
      <text:p text:style-name="P2"><text:span text:style-name="T2">"In Java, le eccezioni evitano il blocco del programma (come i segmentation fault in C) permettendo politiche di recovery. Si dividono in </text:span><text:span text:style-name="T3">unchecked</text:span><text:span text:style-name="T2"> (Runtime exceptions, che non obbligano al controllo) e </text:span><text:span text:style-name="T3">checked</text:span><text:span text:style-name="T2"> (che richiedono obbligatoriamente un blocco </text:span><text:span text:style-name="Source_20_Text"><text:span text:style-name="T2">try-catch</text:span></text:span><text:span text:style-name="T2">). Il blocco </text:span><text:span text:style-name="Source_20_Text"><text:span text:style-name="T2">try</text:span></text:span><text:span text:style-name="T2"> racchiude il codice a rischio, mentre il </text:span><text:span text:style-name="Source_20_Text"><text:span text:style-name="T2">catch</text:span></text:span><text:span text:style-name="T2"> gestisce l'errore. La keyword </text:span><text:span text:style-name="Source_20_Text"><text:span text:style-name="T2">throw</text:span></text:span><text:span text:style-name="T2"> viene usata nel codice per 'lanciare' esplicitamente un'eccezione, ma per farlo è necessario che la firma del metodo dichiari la possibilità di errore usando la keyword </text:span><text:span text:style-name="Source_20_Text"><text:span text:style-name="T2">throws</text:span></text:span><text:span text:style-name="T2">."</text:span></text:p>
      <text:p text:style-name="P1"/>
      <text:p text:style-name="P1"><text:tab/><text:span text:style-name="T1">4. Overriding, Overloading e Costruttori</text:span></text:p>
      <text:p text:style-name="P2"><text:span text:style-name="T2">"L'Overriding ('prevalere su') si verifica quando una sottoclasse ridefinisce un metodo della sua superclasse mantenendo la stessa firma; quando invocato, l'OO richiama il metodo della sottoclasse che 'prevale' su quello del padre. In contesti di ereditarietà, quando si crea un oggetto figlio, la VM deve prima istanziare la classe padre. Pertanto, nel costruttore della sottoclasse la prima istruzione deve essere l'invocazione al costruttore della superclasse tramite la keyword </text:span><text:span text:style-name="Source_20_Text"><text:span text:style-name="T2">super()</text:span></text:span><text:span text:style-name="T2">, altrimenti il codice non compila."</text:span></text:p>
      <text:p text:style-name="P1"/>
      <text:p text:style-name="P1"><text:tab/>5. Paradigma OO vs Procedurale e Incapsulamento</text:p>
      <text:p text:style-name="P4"><text:span text:style-name="T1">Domanda:</text:span> <text:span text:style-name="T5">Quali sono i vantaggi del paradigma Object-Oriented rispetto a quello procedurale (es. C)? Spiega il concetto di Incapsulamento.</text:span> <text:span text:style-name="T1">Risposta d'Oro:</text:span></text:p>
      <text:p text:style-name="P2"><text:span text:style-name="T2">L'evoluzione dal paradigma procedurale a quello Object-Oriented (approccio bottom-up) nasce per migliorare l'efficienza e la manutenzione del software. Nel linguaggio C non è possibile proteggere i dati in modo nativo da accessi non autorizzati; con l'OO, invece, si introduce il concetto di Classe, un tipo di dato personalizzato che contiene sia i dati sia le funzionalità (metodi) per manipolarli. Questo porta all'</text:span><text:span text:style-name="T3">Incapsulamento</text:span><text:span text:style-name="T2">: gli attributi vengono dichiarati </text:span><text:span text:style-name="Source_20_Text"><text:span text:style-name="T2">private</text:span></text:span><text:span text:style-name="T2"> e possono essere letti o modificati all'esterno solo attraverso specifici metodi pubblici di accesso (Getter e Setter), tutelando l'integrità del sistema.</text:span></text:p>
      <text:p text:style-name="P1"/>
      <text:p text:style-name="P1"><text:tab/>6. Gestione della Memoria e Garbage Collector</text:p>
      <text:p text:style-name="P4"><text:span text:style-name="T1">Domanda:</text:span> <text:span text:style-name="T5">Come viene gestita la memoria in Java rispetto al C? Quali sono i pro e i contro di questo approccio?</text:span> <text:span text:style-name="T1">Risposta d'Oro:</text:span></text:p>
      <text:p text:style-name="P2"><text:span text:style-name="T2">In Java, i puntatori sono nascosti al programmatore e l'allocazione/deallocazione degli oggetti (tramite la keyword </text:span><text:span text:style-name="Source_20_Text"><text:span text:style-name="T2">new</text:span></text:span><text:span text:style-name="T2">) è gestita automaticamente. Questo risolve la criticità principale del C, ovvero il </text:span><text:span text:style-name="T3">memory leakage</text:span><text:span text:style-name="T2"> causato dalle mancate operazioni di </text:span><text:span text:style-name="T3">free</text:span><text:span text:style-name="T2">. In Java, quando un'area di memoria non è più puntata da alcun riferimento, viene marcata affinché un programma periodico chiamato </text:span><text:span text:style-name="T3">Garbage Collector</text:span><text:span text:style-name="T2"> la liberi automaticamente. Il rovescio della medaglia è che, a causa dei cicli periodici del Garbage Collector, Java non può essere utilizzato per programmare sistemi </text:span><text:span text:style-name="T3">real-time</text:span><text:span text:style-name="T2"> stretti.</text:span></text:p>
      <text:p text:style-name="P1"/>
      <text:p text:style-name="P5"><text:tab/></text:p>
      <text:p text:style-name="P5"><text:soft-page-break/>7. Classi Wrapper, Autoboxing e Unboxing</text:p>
      <text:p text:style-name="P4"><text:span text:style-name="T1">Domanda:</text:span> <text:span text:style-name="T5">Cosa sono le Classi Wrapper? Si spieghi il meccanismo di Autoboxing e Unboxing.</text:span> <text:span text:style-name="T1">Risposta d'Oro:</text:span></text:p>
      <text:p text:style-name="P2"><text:span text:style-name="T2">Le Classi Wrapper (come </text:span><text:span text:style-name="Source_20_Text"><text:span text:style-name="T2">Integer</text:span></text:span><text:span text:style-name="T2">, </text:span><text:span text:style-name="Source_20_Text"><text:span text:style-name="T2">Double</text:span></text:span><text:span text:style-name="T2">) sono versioni "a oggetto" dei tipi primitivi base di Java (</text:span><text:span text:style-name="Source_20_Text"><text:span text:style-name="T2">int</text:span></text:span><text:span text:style-name="T2">, </text:span><text:span text:style-name="Source_20_Text"><text:span text:style-name="T2">double</text:span></text:span><text:span text:style-name="T2">). Questo è necessario perché alcune strutture, come le Collection, accettano solo oggetti. L'</text:span><text:span text:style-name="T3">Autoboxing</text:span><text:span text:style-name="T2"> è il processo automatico che compie il compilatore in maniera trasparente per convertire un tipo primitivo nel corrispondente oggetto Wrapper (es. </text:span><text:span text:style-name="Source_20_Text"><text:span text:style-name="T2">vett[2] = 5;</text:span></text:span><text:span text:style-name="T2"> diventa </text:span><text:span text:style-name="Source_20_Text"><text:span text:style-name="T2">vett[2] = new Integer(5);</text:span></text:span><text:span text:style-name="T2">). L'</text:span><text:span text:style-name="T3">Unboxing</text:span><text:span text:style-name="T2"> è l'operazione esatta inversa, che estrapola automaticamente il valore primitivo dall'oggetto Wrapper.</text:span></text:p>
      <text:p text:style-name="P1"/>
      <text:p text:style-name="P1"><text:tab/>8. Interfacce e Polimorfismo</text:p>
      <text:p text:style-name="P4"><text:span text:style-name="T1">Domanda:</text:span> <text:span text:style-name="T5">A cosa servono le Interfacce in Java? Qual è il loro legame con il Polimorfismo?</text:span> <text:span text:style-name="T1">Risposta d'Oro:</text:span></text:p>
      <text:p text:style-name="P2"><text:span text:style-name="T2">Il </text:span><text:span text:style-name="T3">Polimorfismo</text:span><text:span text:style-name="T2"> è la capacità dei linguaggi OO di inserire all'interno di una variabile di tipo "Padre" qualsiasi oggetto discendente da essa, permettendo di scriverne il codice in modo astratto. Per massimizzare questa astrazione si usano le </text:span><text:span text:style-name="T3">Interfacce</text:span><text:span text:style-name="T2">, ovvero classi che non possono essere istanziate e che contengono esclusivamente le "firme" (signature) dei metodi senza alcun codice implementativo. L'interfaccia funge da "contratto": tutte le classi che la utilizzano (con la keyword </text:span><text:span text:style-name="Source_20_Text"><text:span text:style-name="T2">implements</text:span></text:span><text:span text:style-name="T2"> al posto di </text:span><text:span text:style-name="Source_20_Text"><text:span text:style-name="T2">extends</text:span></text:span><text:span text:style-name="T2">) si impegnano a fornire l'implementazione pratica di tutti i metodi in essa definiti.</text:span></text:p>
      <text:p text:style-name="P1"/>
      <text:p text:style-name="P1"><text:tab/>9. Collection Framework: Array vs Liste</text:p>
      <text:p text:style-name="P4"><text:span text:style-name="T1">Domanda:</text:span> <text:span text:style-name="T5">Quali sono le differenze principali tra i normali Array e le Collection (in particolare le Liste come ArrayList)?</text:span> <text:span text:style-name="T1">Risposta d'Oro:</text:span></text:p>
      <text:p text:style-name="P2"><text:span text:style-name="T2">Le Collection sono strutture dati dinamiche fornite da Java per superare il limite di dimensione fissa dei normali Array. Un' </text:span><text:span text:style-name="Source_20_Text"><text:span text:style-name="T2">ArrayList</text:span></text:span><text:span text:style-name="T2">, ad esempio, gestisce automaticamente la capacità: una volta saturata la memoria assegnata, Java crea un nuovo array più grande del 50% trasferendovi i dati. I normali Array offrono il vantaggio dell'accesso diretto in lettura, ma sono molto lenti nelle modifiche strutturali; al contrario, le Liste (in particolare le </text:span><text:span text:style-name="Source_20_Text"><text:span text:style-name="T2">LinkedList</text:span></text:span><text:span text:style-name="T2">) permettono modifiche e aggiunte istantanee, a costo però di un accesso puramente sequenziale ai dati tramite iteratori.</text:span></text:p>
      <text:p text:style-name="P1"/>
      <text:p text:style-name="P3"><text:span text:style-name="T2"><text:tab/>10. Le keyword </text:span><text:span text:style-name="Source_20_Text"><text:span text:style-name="T2">this</text:span></text:span><text:span text:style-name="T2"> e </text:span><text:span text:style-name="Source_20_Text"><text:span text:style-name="T2">super</text:span></text:span></text:p>
      <text:p text:style-name="P6"><text:span text:style-name="T4">Domanda:</text:span><text:span text:style-name="T2"> </text:span><text:span text:style-name="T3">A cosa servono le parole chiave </text:span><text:span text:style-name="Source_20_Text"><text:span text:style-name="T3">this</text:span></text:span><text:span text:style-name="T3"> e </text:span><text:span text:style-name="Source_20_Text"><text:span text:style-name="T3">super</text:span></text:span><text:span text:style-name="T3"> in Java?</text:span><text:span text:style-name="T2"> </text:span><text:span text:style-name="T4">Risposta d'Oro:</text:span></text:p>
      <text:p text:style-name="P2"><text:span text:style-name="T2">La keyword </text:span><text:span text:style-name="Source_20_Text"><text:span text:style-name="T2">this</text:span></text:span><text:span text:style-name="T2"> rappresenta l'indirizzo di memoria dell'istanza corrente dell'oggetto in cui ci si trova. Viene utilizzata principalmente per risolvere problemi di </text:span><text:span text:style-name="T3">shadowing</text:span><text:span text:style-name="T2"> (quando un parametro di un metodo ha lo stesso nome di un attributo della classe, es: </text:span><text:span text:style-name="Source_20_Text"><text:span text:style-name="T2">this.IBAN = IBAN;</text:span></text:span><text:span text:style-name="T2">) e per gestire agevolmente le associazioni bidirezionali tra oggetti. La keyword </text:span><text:span text:style-name="Source_20_Text"><text:span text:style-name="T2">super</text:span></text:span><text:span text:style-name="T2"> funge da "this per la superclasse". Si usa per richiamare i metodi della classe padre o, in particolare all'inizio del costruttore di una sottoclasse (</text:span><text:span text:style-name="Source_20_Text"><text:span text:style-name="T2">super();</text:span></text:span><text:span text:style-name="T2">), per forzare la Java VM a istanziare preventivamente l'oggetto padre in memoria prima di allocare le variabili aggiuntive della sottoclas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ERRORE NEL CODICE:<text:line-break/><text:line-break/>cose comuni:</text:p>
      <text:p text:style-name="P8"><text:span text:style-name="T2">(AUTO Panda)</text:span><text:span text:style-name="Source_20_Text"><text:span text:style-name="T2"> </text:span></text:span><text:span text:style-name="Source_20_Text"><text:span text:style-name="T6">(no)</text:span></text:span></text:p>
      <text:p text:style-name="P9"><text:span text:style-name="T7">List</text:span><text:span text:style-name="T8"> essendo un’interfaccia </text:span><text:span text:style-name="T2">non p</text:span><text:span text:style-name="T8">osso</text:span><text:span text:style-name="T2"> mai istanziare un'interfaccia con la keyword </text:span><text:span text:style-name="Source_20_Text"><text:span text:style-name="T2">new</text:span></text:span></text:p>
      <text:p text:style-name="P10"><text:span text:style-name="Source_20_Text"><text:span text:style-name="T4">Sbagliato:</text:span></text:span><text:span text:style-name="Source_20_Text"><text:span text:style-name="T2"> List&lt;Auto&gt; garage = new List&lt;Auto&gt;();</text:span></text:span></text:p>
      <text:p text:style-name="P10"><text:span text:style-name="T4">Corretto:</text:span><text:span text:style-name="T2"> </text:span><text:span text:style-name="Source_20_Text"><text:span text:style-name="T2">List&lt;Auto&gt; garage = new ArrayList&lt;Auto&gt;();</text:span></text:span></text:p>
      <text:p text:style-name="P9"><text:span text:style-name="Source_20_Text"><text:span text:style-name="T2"/></text:span></text:p>
      <text:p text:style-name="P9"><text:span text:style-name="Source_20_Text"><text:span text:style-name="T2">Se fai un </text:span></text:span><text:span text:style-name="Source_20_Text"><text:span text:style-name="T9">throw new Exception</text:span></text:span><text:span text:style-name="Source_20_Text"><text:span text:style-name="T2"> </text:span></text:span><text:span text:style-name="Source_20_Text"><text:span text:style-name="T8">(Checked)</text:span></text:span><text:span text:style-name="Source_20_Text"><text:span text:style-name="T2"> dentro un metodo, devi avvisare chi userà quel metodo aggiungendo throws al suo nome.</text:span></text:span></text:p>
      <text:p text:style-name="P9"><text:span text:style-name="Source_20_Text"><text:span text:style-name="T2"/></text:span></text:p>
      <text:p text:style-name="P9"><text:span text:style-name="Source_20_Text"><text:span text:style-name="T2">public void controllaRevisione(int anno) </text:span></text:span><text:span text:style-name="Source_20_Text"><text:span text:style-name="T10">throws Exception</text:span></text:span><text:span text:style-name="Source_20_Text"><text:span text:style-name="T2"> { // &lt;--- Aggiunto throws Exception</text:span></text:span></text:p>
      <text:p text:style-name="P9"><text:span text:style-name="Source_20_Text"><text:span text:style-name="T2"><text:s text:c="4"/>if (anno &lt; 2024) {</text:span></text:span></text:p>
      <text:p text:style-name="P9"><text:span text:style-name="Source_20_Text"><text:span text:style-name="T2"><text:s text:c="8"/>throw new Exception("Revisione scaduta!");</text:span></text:span></text:p>
      <text:p text:style-name="P9"><text:span text:style-name="Source_20_Text"><text:span text:style-name="T2"><text:s text:c="4"/>}</text:span></text:span></text:p>
      <text:p text:style-name="P9"><text:span text:style-name="Source_20_Text"><text:span text:style-name="T2">}</text:span></text:span></text:p>
      <text:p text:style-name="P9"><text:span text:style-name="Source_20_Text"><text:span text:style-name="T2"/></text:span></text:p>
      <text:p text:style-name="P9"><text:span text:style-name="Source_20_Text"><text:span text:style-name="T9">errore logico sulle Stringhe</text:span></text:span><text:span text:style-name="Source_20_Text"><text:span text:style-name="T2"> (Il tranello più classico)<text:line-break/>se usi l'operatore </text:span></text:span><text:span text:style-name="Source_20_Text"><text:span text:style-name="T10">==</text:span></text:span><text:span text:style-name="Source_20_Text"><text:span text:style-name="T2"> tra due oggetti (e le Stringhe sono oggetti), stai confrontando i loro </text:span></text:span><text:span text:style-name="Source_20_Text"><text:span text:style-name="T4">indirizzi di memoria</text:span></text:span><text:span text:style-name="Source_20_Text"><text:span text:style-name="T2">, non le lettere che contengono</text:span></text:span></text:p>
      <text:p text:style-name="P10"><text:span text:style-name="Source_20_Text"><text:span text:style-name="T2">Poiché stringaTest è stata creata con new String("Panda"), è un oggetto nuovo in una cella di memoria diversa rispetto a "Panda" salvato in miaAuto.modello. L'operatore == direbbe "Falso".</text:span></text:span></text:p>
      <text:list text:style-name="L1">
        <text:list-item>
          <text:p text:style-name="P11"><text:span text:style-name="T4">Sbagliato:</text:span><text:span text:style-name="T2"> </text:span><text:span text:style-name="Source_20_Text"><text:span text:style-name="T2">if (miaAuto.modello == stringaTest)</text:span></text:span></text:p>
        </text:list-item>
        <text:list-item>
          <text:p text:style-name="P11"><text:span text:style-name="T4">Corretto:</text:span><text:span text:style-name="T2"> </text:span><text:span text:style-name="Source_20_Text"><text:span text:style-name="T2">if (miaAuto.modello.</text:span></text:span><text:span text:style-name="Source_20_Text"><text:span text:style-name="T10">equals</text:span></text:span><text:span text:style-name="Source_20_Text"><text:span text:style-name="T2">(stringaTest)) </text:span></text:span><text:span text:style-name="Source_20_Text"><text:span text:style-name="T8">(uso equals)</text:span></text:span></text:p>
        </text:list-item>
      </text:list>
      <text:p text:style-name="P10"><text:span text:style-name="Source_20_Text"><text:span text:style-name="T8">output (es auto): </text:span></text:span><text:span text:style-name="Source_20_Text"><text:span text:style-name="T2">Creiamo l'auto ("Panda"), condizione è </text:span></text:span><text:span text:style-name="Source_20_Text"><text:span text:style-name="T4">Vera</text:span></text:span><text:span text:style-name="Source_20_Text"><text:span text:style-name="T2"> ("Panda" è uguale a "Panda"), </text:span></text:span><text:span text:style-name="Source_20_Text"><text:span text:style-name="T3">Stampa:</text:span></text:span><text:span text:style-name="Source_20_Text"><text:span text:style-name="T2"> </text:span></text:span><text:span text:style-name="Source_20_Text"><text:span text:style-name="T4">I modelli corrispondono!, Chiamiamo miaAuto.controllaRevisione(2023). Essendo 2023 minore di 2024, il metodo "lancia" l'eccezione con il messaggio "Revisione scaduta!". L'esecuzione si interrompe all'istante (salta il "Tutto in regola") e finisce dritta nel blocco catch. -&gt; </text:span></text:span><text:span text:style-name="Source_20_Text"><text:span text:style-name="T11">Stampa:</text:span></text:span><text:span text:style-name="Source_20_Text"><text:span text:style-name="T4"> Attenzione: Revisione scaduta! </text:span></text:span><text:span text:style-name="Source_20_Text"><text:span text:style-name="T12">(I modelli corrispondono! Attenzione: Revisione scaduta!)</text:span></text:span></text:p>
      <text:p text:style-name="P9"><text:span text:style-name="Source_20_Text"><text:span text:style-name="T2"/></text:span></text:p>
      <text:p text:style-name="P12"><text:span text:style-name="Source_20_Text"><text:span text:style-name="T13">Lo Studente "Luca" </text:span></text:span><text:span text:style-name="Source_20_Text"><text:span text:style-name="T14">(no)</text:span></text:span><text:span text:style-name="Source_20_Text"><text:span text:style-name="T2"> Ottobre 2023 / Giugno 2025</text:span></text:span></text:p>
      <text:p text:style-name="P9"><text:span text:style-name="Source_20_Text"><text:span text:style-name="T9">costruttore</text:span></text:span><text:span text:style-name="Source_20_Text"><text:span text:style-name="T2"> di Student viene chiamato super(n, a);, ma il costruttore del padre Person richiede 3 parametri (String n, int a, String g). </text:span></text:span><text:span text:style-name="Source_20_Text"><text:span text:style-name="T4">Correzione:</text:span></text:span><text:span text:style-name="Source_20_Text"><text:span text:style-name="T2"> super(n, a, "n/a");<text:line-break/><text:line-break/>Il </text:span></text:span><text:span text:style-name="Source_20_Text"><text:span text:style-name="T9">metodo describe_myself()</text:span></text:span><text:span text:style-name="Source_20_Text"><text:span text:style-name="T2"> dichiara throws Exception. Nel main, l'invocazione di questo metodo è dentro un blocco try, ma i catch intercettano solo IndexOutOfBoundsException e NullPointerException. Poiché Exception è </text:span></text:span><text:span text:style-name="Source_20_Text"><text:span text:style-name="T3">checked</text:span></text:span><text:span text:style-name="Source_20_Text"><text:span text:style-name="T2">, il compilatore darà errore finché non aggiungi un catch (Exception e).</text:span></text:span></text:p>
      <text:p text:style-name="P12"><text:span text:style-name="Source_20_Text"><text:span text:style-name="T15">OUTPUT: </text:span></text:span><text:span text:style-name="Source_20_Text"><text:span text:style-name="T2">istanziato uno studente di nome "Luca". Quando si chiama describe_myself(), l'if scatta e lancia l'eccezione: </text:span></text:span><text:span text:style-name="Source_20_Text"><text:span text:style-name="T15">OUTPUT “</text:span></text:span><text:span text:style-name="Source_20_Text"><text:span text:style-name="T2">INIZIO METODO MAIN” Stampa il messaggio dell'eccezione: "I hate the person named Luca!" FINE METODO MAIN<text:line-break/><text:line-break/></text:span></text:span><text:span text:style-name="Source_20_Text"><text:span text:style-name="T13">Valutazione Esami </text:span></text:span><text:span text:style-name="Source_20_Text"><text:span text:style-name="T14">(no)</text:span></text:span><text:span text:style-name="Source_20_Text"><text:span text:style-name="T2">16 Gennaio 2025 </text:span></text:span><text:span text:style-name="Source_20_Text"><text:span text:style-name="T15">(sempre stringa)</text:span></text:span></text:p>
      <text:p text:style-name="P13"><text:span text:style-name="Source_20_Text"><text:span text:style-name="T2">Nel main viene inizializzata la lista così: List&lt;String&gt; a = new List&lt;&gt;();. </text:span></text:span><text:span text:style-name="Source_20_Text"><text:span text:style-name="T4">Correzione:</text:span></text:span><text:span text:style-name="Source_20_Text"><text:span text:style-name="T2"> Non si può istanziare un'interfaccia. Va cambiato in new </text:span></text:span><text:span text:style-name="Source_20_Text"><text:span text:style-name="T9">ArrayList</text:span></text:span><text:span text:style-name="Source_20_Text"><text:span text:style-name="T2">&lt;&gt;();.</text:span></text:span></text:p>
      <text:p text:style-name="P13"><text:span text:style-name="Source_20_Text"><text:span text:style-name="T2">metodo evaluate() lancia throw new Exception("Esame non superato..."), ma la sua firma non lo dichiara. </text:span></text:span><text:span text:style-name="Source_20_Text"><text:span text:style-name="T4">Correzione:</text:span></text:span><text:span text:style-name="Source_20_Text"><text:span text:style-name="T2"> Aggiungere throws Exception</text:span></text:span></text:p>
      <text:p text:style-name="P12"><text:span text:style-name="Source_20_Text"><text:span text:style-name="T15">output: </text:span></text:span><text:span text:style-name="Source_20_Text"><text:span text:style-name="T2">VALUTAZIONE IN CORSO... VOTO MINORE DI 18! Bocciato!Esame non superato, voto:16.5 FINE VALUTAZIONE<text:line-break/><text:line-break/></text:span></text:span><text:span text:style-name="Source_20_Text"><text:span text:style-name="T13">Indovina il Numero </text:span></text:span><text:span text:style-name="Source_20_Text"><text:span text:style-name="T14">(no)</text:span></text:span></text:p>
      <text:p text:style-name="P9"><text:span text:style-name="Source_20_Text"><text:span text:style-name="T2">Classe GuessNumber, Il metodo guess(int n) lancia la InvalidNumberException (che estende Exception, quindi è </text:span></text:span><text:span text:style-name="Source_20_Text"><text:span text:style-name="T3">checked</text:span></text:span><text:span text:style-name="Source_20_Text"><text:span text:style-name="T2">), ma non ha il throws nella firma. </text:span></text:span><text:span text:style-name="Source_20_Text"><text:span text:style-name="T4">Correzione:</text:span></text:span><text:span text:style-name="Source_20_Text"><text:span text:style-name="T2"> public boolean guess(int n) throws InvalidNumberException. Nel catch del main si cerca di stampare e.msg. Tuttavia, nella classe dell'eccezione, msg è dichiarato </text:span></text:span><text:span text:style-name="Source_20_Text"><text:span text:style-name="T10">private</text:span></text:span><text:span text:style-name="Source_20_Text"><text:span text:style-name="T2"> String msg;! </text:span></text:span><text:span text:style-name="Source_20_Text"><text:span text:style-name="T4">Correzione:</text:span></text:span><text:span text:style-name="Source_20_Text"><text:span text:style-name="T2"> </text:span></text:span><text:span text:style-name="Source_20_Text"><text:span text:style-name="T10">Cambiare in public</text:span></text:span><text:span text:style-name="Source_20_Text"><text:span text:style-name="T2"> String msg;</text:span></text:span></text:p>
      <text:p text:style-name="P14"><text:span text:style-name="Source_20_Text"><text:span text:style-name="T16">OUTPUT:</text:span></text:span></text:p>
      <text:p text:style-name="P14"><text:span text:style-name="Source_20_Text"><text:span text:style-name="T2">g.guess(123) -&gt; Ritorna false (123 != 42). </text:span></text:span><text:span text:style-name="Source_20_Text"><text:span text:style-name="T3">Stampa:</text:span></text:span><text:span text:style-name="Source_20_Text"><text:span text:style-name="T2"> false</text:span></text:span></text:p>
      <text:p text:style-name="P14"><text:span text:style-name="Source_20_Text"><text:span text:style-name="T2">g.guess(-99) -&gt; Essendo negativo, lancia l'eccezione. Viene catturata e si stampa il messaggio. </text:span></text:span><text:span text:style-name="Source_20_Text"><text:span text:style-name="T3">Stampa:</text:span></text:span><text:span text:style-name="Source_20_Text"><text:span text:style-name="T2"> !!!</text:span></text:span></text:p>
      <text:p text:style-name="P14"><text:span text:style-name="Source_20_Text"><text:span text:style-name="T2">Il terzo guess(42) non verrà mai eseguito perché il programma è saltato nel blocco catch.</text:span></text:span></text:p>
      <text:p text:style-name="P14"><text:span text:style-name="Source_20_Text"><text:span text:style-name="T2"/></text:span></text:p>
      <text:p text:style-name="P15"><text:span text:style-name="Source_20_Text"><text:span text:style-name="T13"/></text:span></text:p>
      <text:p text:style-name="P15"><text:span text:style-name="Source_20_Text"><text:span text:style-name="T13"/></text:span></text:p>
      <text:p text:style-name="P15"><text:soft-page-break/><text:span text:style-name="Source_20_Text"><text:span text:style-name="T13">Negozio di Dispositivi </text:span></text:span><text:span text:style-name="Source_20_Text"><text:span text:style-name="T14">(ha overriding</text:span></text:span><text:span text:style-name="Source_20_Text"><text:span text:style-name="T17"> public void print()</text:span></text:span><text:span text:style-name="Source_20_Text"><text:span text:style-name="T14">no overloading)</text:span></text:span></text:p>
      <text:p text:style-name="P14"><text:span text:style-name="T2">Classi </text:span><text:span text:style-name="Source_20_Text"><text:span text:style-name="T2">Device</text:span></text:span><text:span text:style-name="T2">, </text:span><text:span text:style-name="Source_20_Text"><text:span text:style-name="T2">Smartphone extends Device</text:span></text:span><text:span text:style-name="T2">, e </text:span><text:span text:style-name="Source_20_Text"><text:span text:style-name="T2">Store. Nel main, il metodo store.addNewDevice(...) dichiara di lanciare una Exception. Tuttavia, nel main non c'è nessun blocco try-catch, né il main dichiara a sua volta throws Exception. </text:span></text:span><text:span text:style-name="Source_20_Text"><text:span text:style-name="T4">Correzione:</text:span></text:span><text:span text:style-name="Source_20_Text"><text:span text:style-name="T2"> Inserire l'invocazione dentro un try-catch. </text:span></text:span><text:span text:style-name="Source_20_Text"><text:span text:style-name="T18">OUTPUT</text:span></text:span><text:span text:style-name="Source_20_Text"><text:span text:style-name="T2"> sarà il messaggio intercettato nel catch: "Capacity too low: 800mAh"</text:span></text:span></text:p>
      <text:p text:style-name="P14"><text:span text:style-name="Source_20_Text"><text:span text:style-name="T2"/></text:span></text:p>
      <text:p text:style-name="P12"><text:span text:style-name="Source_20_Text"><text:span text:style-name="T13">Barzellette/JokeTeller </text:span></text:span><text:span text:style-name="Source_20_Text"><text:span text:style-name="T14">(no)</text:span></text:span></text:p>
      <text:p text:style-name="P14"><text:span text:style-name="Source_20_Text"><text:span text:style-name="T2">tellJoke(int index) lancia una OldJokeException (che estende Exception), ma non ha throws OldJokeException nella firma. </text:span></text:span><text:span text:style-name="Source_20_Text"><text:span text:style-name="T4">Correzione:</text:span></text:span><text:span text:style-name="Source_20_Text"><text:span text:style-name="T2"> Aggiungere throws.Nel main viene invocato tellJoke(1) senza un blocco try-catch</text:span></text:span></text:p>
      <text:p text:style-name="P14"><text:span text:style-name="Source_20_Text"><text:span text:style-name="T18">OUTPUT: </text:span></text:span><text:span text:style-name="Source_20_Text"><text:span text:style-name="T2">jokeTeller.tellJoke(0); -&gt; L'anno è 2015 (non è &lt; 2013). Stampa la barzelletta. jokeTeller.tellJoke(1); -&gt; L'anno è 2011 (&lt; 2013). Lancia l'eccezione. "Barzelletta troppo vecchia!"</text:span></text:span></text:p>
      <text:p text:style-name="P14"><text:span text:style-name="Source_20_Text"><text:span text:style-name="T2"/></text:span></text:p>
      <text:p text:style-name="P14"><text:span text:style-name="Source_20_Text"><text:span text:style-name="T13">Chuck Norris </text:span></text:span><text:span text:style-name="Source_20_Text"><text:span text:style-name="T14">(no)</text:span></text:span></text:p>
      <text:p text:style-name="P14"><text:span text:style-name="T2">La classe </text:span><text:span text:style-name="Source_20_Text"><text:span text:style-name="T2">Person</text:span></text:span><text:span text:style-name="T2"> ha solo un costruttore con parametri: </text:span><text:span text:style-name="Source_20_Text"><text:span text:style-name="T2">Person(String n, int a, String g)</text:span></text:span><text:span text:style-name="T2">. La classe </text:span><text:span text:style-name="Source_20_Text"><text:span text:style-name="T2">ChuckNorris</text:span></text:span><text:span text:style-name="T2"> ha un costruttore vuoto </text:span><text:span text:style-name="Source_20_Text"><text:span text:style-name="T2">ChuckNorris()</text:span></text:span><text:span text:style-name="T2"> che non richiama </text:span><text:span text:style-name="Source_20_Text"><text:span text:style-name="T2">super(...)</text:span></text:span><text:span text:style-name="T2">. </text:span><text:span text:style-name="T4">Correzione:</text:span><text:span text:style-name="T2"> Aggiungere </text:span><text:span text:style-name="Source_20_Text"><text:span text:style-name="T2">super("Chuck", 50, "M");</text:span></text:span><text:span text:style-name="T2"> come prima riga del costruttore. Il metodo </text:span><text:span text:style-name="Source_20_Text"><text:span text:style-name="T2">generateChuckNorrisJokeNumber</text:span></text:span><text:span text:style-name="T2"> può lanciare una </text:span><text:span text:style-name="Source_20_Text"><text:span text:style-name="T2">Exception</text:span></text:span><text:span text:style-name="T2"> e nel </text:span><text:span text:style-name="Source_20_Text"><text:span text:style-name="T2">main</text:span></text:span><text:span text:style-name="T2"> non c'è il </text:span><text:span text:style-name="Source_20_Text"><text:span text:style-name="T2">try-catch</text:span></text:span><text:span text:style-name="T2">. </text:span><text:span text:style-name="T18">OUTPUT: </text:span><text:span text:style-name="T2">"Hello Chuck!" </text:span><text:span text:style-name="T18">seguito da </text:span><text:span text:style-name="T2">"It's not the time to have fun!"</text:span></text:p>
      <text:p text:style-name="P16"/>
      <text:p text:style-name="P15"><text:span text:style-name="T13">Animali e Cani </text:span><text:span text:style-name="Source_20_Text"><text:span text:style-name="T14">(ha overriding </text:span></text:span><text:span text:style-name="Source_20_Text"><text:span text:style-name="T2">void printColor()</text:span></text:span><text:span text:style-name="Source_20_Text"><text:span text:style-name="T14"> no overloading)</text:span></text:span></text:p>
      <text:p text:style-name="P12"><text:span text:style-name="T19">Dentro il costruttore di </text:span><text:span text:style-name="Source_20_Text"><text:span text:style-name="T19">Animal</text:span></text:span><text:span text:style-name="T19">, c'è scritto </text:span><text:span text:style-name="Source_20_Text"><text:span text:style-name="T9">String color="white"</text:span></text:span><text:span text:style-name="Source_20_Text"><text:span text:style-name="T19">;</text:span></text:span><text:span text:style-name="T19">. Questo dichiara una </text:span><text:span text:style-name="T20">variabile locale</text:span><text:span text:style-name="T19"> al costruttore, che viene distrutta subito dopo. Il metodo </text:span><text:span text:style-name="Source_20_Text"><text:span text:style-name="T19">printColor()</text:span></text:span><text:span text:style-name="T19"> della stessa classe cerca di stampare </text:span><text:span text:style-name="Source_20_Text"><text:span text:style-name="T19">color</text:span></text:span><text:span text:style-name="T19"> ma dà errore perché non esiste a livello di classe! </text:span><text:span text:style-name="T21">Correzione:</text:span><text:span text:style-name="T19"> Bisogna </text:span><text:span text:style-name="T9">dichiarare l'attributo </text:span><text:span text:style-name="Source_20_Text"><text:span text:style-name="T9">String color;</text:span></text:span><text:span text:style-name="T9"> fuori dal costruttore</text:span><text:span text:style-name="T19">, e nel costruttore fare </text:span><text:span text:style-name="Source_20_Text"><text:span text:style-name="T9">this.color = "white";</text:span></text:span><text:span text:style-name="T19">.</text:span><text:span text:style-name="T2">class Animal { String color; Animal() { this.color </text:span><text:span text:style-name="T6">= “white”;}</text:span></text:p>
      <text:p text:style-name="P17">void printColor(){ System.out.println(color);} }</text:p>
      <text:p text:style-name="P18"><text:span text:style-name="T19"><text:s/></text:span><text:span text:style-name="T2">Stessa cosa vale per </text:span><text:span text:style-name="Source_20_Text"><text:span text:style-name="T2">super.color</text:span></text:span><text:span text:style-name="T2"> nella classe </text:span><text:span text:style-name="Source_20_Text"><text:span text:style-name="T2">Dog</text:span></text:span><text:span text:style-name="T2">: non funzionerà finché non sistemi l'attributo in </text:span><text:span text:style-name="Source_20_Text"><text:span text:style-name="T2">Animal class Dog extends Animal { String color; Dog() { this.color = "black"; } void printColor(</text:span></text:span><text:span text:style-name="Source_20_Text"><text:span text:style-name="T6">)</text:span></text:span><text:span text:style-name="Source_20_Text"><text:span text:style-name="T2">{System.out.println(color);System.out.println(super.color);}}</text:span></text:span><text:span text:style-name="T2">. </text:span><text:span text:style-name="T18">OUTPUT: </text:span><text:span text:style-name="T2">Cane: Stampa </text:span><text:span text:style-name="Source_20_Text"><text:span text:style-name="T2">"black"</text:span></text:span><text:span text:style-name="T2">, poi chiama </text:span><text:span text:style-name="Source_20_Text"><text:span text:style-name="T2">super.color</text:span></text:span><text:span text:style-name="T2"> e stampa </text:span><text:span text:style-name="Source_20_Text"><text:span text:style-name="T2">"white"</text:span></text:span><text:span text:style-name="T2">. Animale: Stampa </text:span><text:span text:style-name="Source_20_Text"><text:span text:style-name="T2">"white"</text:span></text:span><text:span text:style-name="T2">.</text:span></text:p>
      <text:p text:style-name="P16"/>
      <text:p text:style-name="P19"><text:span text:style-name="T2">Corsi e Studenti</text:span><text:span text:style-name="Source_20_Text"><text:span text:style-name="T2"> </text:span></text:span><text:span text:style-name="Source_20_Text"><text:span text:style-name="T6">(no)</text:span></text:span></text:p>
      <text:p text:style-name="P20"><text:span text:style-name="T22">Il costruttore di </text:span><text:span text:style-name="Source_20_Text"><text:span text:style-name="T22">StudenteLavoratore</text:span></text:span><text:span text:style-name="T22"> usa </text:span><text:span text:style-name="Source_20_Text"><text:span text:style-name="T22">super.nome = nome</text:span></text:span><text:span text:style-name="T22">. Questo è sbagliato come prassi e non compila se non c'è un costruttore vuoto nel padre. </text:span><text:span text:style-name="T23">Correzione:</text:span><text:span text:style-name="T22"> Usare </text:span><text:span text:style-name="Source_20_Text"><text:span text:style-name="T22">super(nome, matricola);</text:span></text:span><text:span text:style-name="T22">. </text:span><text:span text:style-name="T2">Nel metodo </text:span><text:span text:style-name="Source_20_Text"><text:span text:style-name="T2">stampaStudente</text:span></text:span><text:span text:style-name="T2"> della classe </text:span><text:span text:style-name="Source_20_Text"><text:span text:style-name="T2">Corso</text:span></text:span><text:span text:style-name="T2"> c'è un typo micidiale: si chiama </text:span><text:span text:style-name="Source_20_Text"><text:span text:style-name="T2">this.studenti1[i]</text:span></text:span><text:span text:style-name="T2"> invece di </text:span><text:span text:style-name="Source_20_Text"><text:span text:style-name="T2">this.studenti[i]</text:span></text:span><text:span text:style-name="T2">. </text:span><text:span text:style-name="T18">OUTPUT </text:span><text:span text:style-name="Source_20_Text"><text:span text:style-name="T2">"Studente non trovato"</text:span></text:span></text:p>
      <text:p text:style-name="P20"><text:span text:style-name="Source_20_Text"><text:span text:style-name="T2"/></text:span></text:p>
      <text:p text:style-name="P21"><text:span text:style-name="Source_20_Text"><text:span text:style-name="T24">Cane che mangia (Ha overriding</text:span></text:span><text:span text:style-name="Source_20_Text"><text:span text:style-name="T25"> void eat() </text:span></text:span><text:span text:style-name="Source_20_Text"><text:span text:style-name="T24">no overloading)</text:span></text:span><text:span text:style-name="Source_20_Text"><text:span text:style-name="T26"> <text:s/></text:span></text:span><text:span text:style-name="Source_20_Text"><text:span text:style-name="T27">NEW 24/06/2026</text:span></text:span></text:p>
      <text:p text:style-name="P21"><text:span text:style-name="Source_20_Text"><text:span text:style-name="T26">La variabile </text:span></text:span><text:span text:style-name="Source_20_Text"><text:span text:style-name="T28">animal</text:span></text:span><text:span text:style-name="Source_20_Text"><text:span text:style-name="T26"> è dichiarata con tipo statico </text:span></text:span><text:span text:style-name="Source_20_Text"><text:span text:style-name="T28">Animal</text:span></text:span><text:span text:style-name="Source_20_Text"><text:span text:style-name="T26">, ma istanziata come </text:span></text:span><text:span text:style-name="Source_20_Text"><text:span text:style-name="T28">new Dog();</text:span></text:span><text:span text:style-name="Source_20_Text"><text:span text:style-name="T26">. A tempo di compilazione, il compilatore verifica i metodi sul tipo di riferimento (</text:span></text:span><text:span text:style-name="Source_20_Text"><text:span text:style-name="T28">Animal</text:span></text:span><text:span text:style-name="Source_20_Text"><text:span text:style-name="T26">). Poiché i metodi </text:span></text:span><text:span text:style-name="Source_20_Text"><text:span text:style-name="T28">bark()</text:span></text:span><text:span text:style-name="Source_20_Text"><text:span text:style-name="T26"> e </text:span></text:span><text:span text:style-name="Source_20_Text"><text:span text:style-name="T28">increase_dog_weight()</text:span></text:span><text:span text:style-name="Source_20_Text"><text:span text:style-name="T26"> sono definiti solo nella sottoclasse </text:span></text:span><text:span text:style-name="Source_20_Text"><text:span text:style-name="T28">Dog</text:span></text:span><text:span text:style-name="Source_20_Text"><text:span text:style-name="T26">, il codice non compila. Correzione: Cambiare la riga in </text:span></text:span><text:span text:style-name="Source_20_Text"><text:span text:style-name="T28">Dog animal = new Dog();</text:span></text:span><text:span text:style-name="Source_20_Text"><text:span text:style-name="T26">. OUTPUT: </text:span></text:span><text:span text:style-name="Source_20_Text"><text:span text:style-name="T28">animal.bark()</text:span></text:span><text:span text:style-name="Source_20_Text"><text:span text:style-name="T26"> stampa </text:span></text:span><text:span text:style-name="Source_20_Text"><text:span text:style-name="T28">"your dog is barking"</text:span></text:span><text:span text:style-name="Source_20_Text"><text:span text:style-name="T26">. Il ciclo </text:span></text:span><text:span text:style-name="Source_20_Text"><text:span text:style-name="T28">for</text:span></text:span><text:span text:style-name="Source_20_Text"><text:span text:style-name="T26"> parte da </text:span></text:span><text:span text:style-name="Source_20_Text"><text:span text:style-name="T28">i=0</text:span></text:span><text:span text:style-name="Source_20_Text"><text:span text:style-name="T26"> a </text:span></text:span><text:span text:style-name="Source_20_Text"><text:span text:style-name="T28">i=5</text:span></text:span><text:span text:style-name="Source_20_Text"><text:span text:style-name="T26">. Ad ogni iterazione viene stampato </text:span></text:span><text:span text:style-name="Source_20_Text"><text:span text:style-name="T28">"your dog is eating"</text:span></text:span><text:span text:style-name="Source_20_Text"><text:span text:style-name="T26"> e aumentato il peso. Al giro </text:span></text:span><text:span text:style-name="Source_20_Text"><text:span text:style-name="T28">i=4</text:span></text:span><text:span text:style-name="Source_20_Text"><text:span text:style-name="T26">, il peso del cane raggiunge </text:span></text:span><text:span text:style-name="Source_20_Text"><text:span text:style-name="T28">20</text:span></text:span><text:span text:style-name="Source_20_Text"><text:span text:style-name="T26">, facendo scattare l'if che lancia la </text:span></text:span><text:span text:style-name="Source_20_Text"><text:span text:style-name="T28">RuntimeException</text:span></text:span><text:span text:style-name="Source_20_Text"><text:span text:style-name="T26">. Il programma si interrompe ed entra nel blocco catch.</text:span></text:span></text:p>
      <text:p text:style-name="P20"><text:span text:style-name="Source_20_Text"><text:span text:style-name="T2"/></text:span></text:p>
      <text:p text:style-name="P22"><text:span text:style-name="Source_20_Text"><text:span text:style-name="T29"/></text:span></text:p>
      <text:p text:style-name="P22"><text:span text:style-name="Source_20_Text"><text:span text:style-name="T29">esempio di overriding</text:span></text:span><text:span text:style-name="Source_20_Text"><text:span text:style-name="T30"><text:line-break/></text:span></text:span><text:span text:style-name="Source_20_Text"><text:span text:style-name="T2">aggiungo un metodo fittizio stampaDettagli() nella classe padre “</text:span></text:span><text:span text:style-name="Source_20_Text"><text:span text:style-name="T30">ClassePadre</text:span></text:span><text:span text:style-name="Source_20_Text"><text:span text:style-name="T2">”, e lo </text:span></text:span><text:span text:style-name="Source_20_Text"><text:span text:style-name="T4">sovrascrivo</text:span></text:span><text:span text:style-name="Source_20_Text"><text:span text:style-name="T2"> nella sottoclasse “</text:span></text:span><text:span text:style-name="Source_20_Text"><text:span text:style-name="T30">ClasseFiglia</text:span></text:span><text:span text:style-name="Source_20_Text"><text:span text:style-name="T2">” in questo modo:"</text:span></text:span></text:p>
      <text:p text:style-name="P22"><text:span text:style-name="Source_20_Text"><text:span text:style-name="T2"/></text:span></text:p>
      <text:p text:style-name="P22"><text:span text:style-name="Source_20_Text"><text:span text:style-name="T2">// Nella classe Padre scrivo:</text:span></text:span></text:p>
      <text:p text:style-name="P22"><text:span text:style-name="Source_20_Text"><text:span text:style-name="T2">public void stampaDettagli() {</text:span></text:span></text:p>
      <text:p text:style-name="P22"><text:span text:style-name="Source_20_Text"><text:span text:style-name="T2"><text:s text:c="4"/>System.out.println("</text:span></text:span><text:span text:style-name="Source_20_Text"><text:span text:style-name="T30">Dettagli padre</text:span></text:span><text:span text:style-name="Source_20_Text"><text:span text:style-name="T2">");</text:span></text:span></text:p>
      <text:p text:style-name="P22"><text:span text:style-name="Source_20_Text"><text:span text:style-name="T2">}</text:span></text:span></text:p>
      <text:p text:style-name="P22"><text:span text:style-name="Source_20_Text"><text:span text:style-name="T2"/></text:span></text:p>
      <text:p text:style-name="P22"><text:span text:style-name="Source_20_Text"><text:span text:style-name="T2">// Nella classe Figlia scrivo lo STESSO metodo:</text:span></text:span></text:p>
      <text:p text:style-name="P22"><text:span text:style-name="Source_20_Text"><text:span text:style-name="T2">@Override </text:span></text:span></text:p>
      <text:p text:style-name="P22"><text:span text:style-name="Source_20_Text"><text:span text:style-name="T2">public void stampaDettagli() {</text:span></text:span></text:p>
      <text:p text:style-name="P22"><text:span text:style-name="Source_20_Text"><text:span text:style-name="T2"><text:s text:c="4"/>System.out.println("</text:span></text:span><text:span text:style-name="Source_20_Text"><text:span text:style-name="T30">Dettagli Figlia</text:span></text:span><text:span text:style-name="Source_20_Text"><text:span text:style-name="T2">");</text:span></text:span></text:p>
      <text:p text:style-name="P22"><text:span text:style-name="Source_20_Text"><text:span text:style-name="T2">}</text:span></text:span></text:p>
      <text:p text:style-name="P22"><text:span text:style-name="Source_20_Text"><text:span text:style-name="T2"/></text:span></text:p>
      <text:p text:style-name="P22"><text:span text:style-name="Source_20_Text"><text:span text:style-name="T30">esempio di overloading</text:span></text:span></text:p>
      <text:p text:style-name="P22"><text:span text:style-name="Source_20_Text"><text:span text:style-name="T2">prendo la classe “</text:span></text:span><text:span text:style-name="Source_20_Text"><text:span text:style-name="T30">NomeClasse</text:span></text:span><text:span text:style-name="Source_20_Text"><text:span text:style-name="T2">” e definisco due metodi chiamati saluta, ma con parametri diversi:"</text:span></text:span></text:p>
      <text:p text:style-name="P22"><text:span text:style-name="Source_20_Text"><text:span text:style-name="T2">// Primo metodo (nessun parametro)</text:span></text:span></text:p>
      <text:p text:style-name="P22"><text:span text:style-name="Source_20_Text"><text:span text:style-name="T2">public void saluta() {</text:span></text:span></text:p>
      <text:p text:style-name="P22"><text:soft-page-break/><text:span text:style-name="Source_20_Text"><text:span text:style-name="T2"><text:s text:c="4"/>System.out.println("Ciao!");</text:span></text:span></text:p>
      <text:p text:style-name="P22"><text:span text:style-name="Source_20_Text"><text:span text:style-name="T2">}</text:span></text:span></text:p>
      <text:p text:style-name="P22"><text:span text:style-name="Source_20_Text"><text:span text:style-name="T2"/></text:span></text:p>
      <text:p text:style-name="P22"><text:span text:style-name="Source_20_Text"><text:span text:style-name="T2">// Secondo metodo (stesso nome, ma ha un parametro in ingresso!)</text:span></text:span></text:p>
      <text:p text:style-name="P22"><text:span text:style-name="Source_20_Text"><text:span text:style-name="T2">public void saluta(String nome) {</text:span></text:span></text:p>
      <text:p text:style-name="P22"><text:span text:style-name="Source_20_Text"><text:span text:style-name="T2"><text:s text:c="4"/>System.out.println("Ciao " + nome + "!");</text:span></text:span></text:p>
      <text:p text:style-name="P22"><text:span text:style-name="Source_20_Text"><text:span text:style-name="T2">}</text:span></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3"><text:span text:style-name="Source_20_Text"><text:span text:style-name="T31">scheletro uml → codice</text:span></text:span></text:p>
      <text:p text:style-name="P23"><text:span text:style-name="Source_20_Text"><text:span text:style-name="T2"/></text:span></text:p>
      <text:h text:style-name="P24" text:outline-level="3"><text:span text:style-name="Source_20_Text"><text:span text:style-name="T2">1. Visibilità (Incapsulamento)</text:span></text:span></text:h>
      <text:p text:style-name="P25">I simboli davanti agli attributi e ai metodi nel Class Diagram indicano la visibilità:</text:p>
      <text:list text:style-name="L2">
        <text:list-item>
          <text:p text:style-name="P26"><text:span text:style-name="T2">Il simbolo </text:span><text:span text:style-name="Source_20_Text"><text:span text:style-name="T4">+</text:span></text:span><text:span text:style-name="T2"> si traduce in </text:span><text:span text:style-name="Source_20_Text"><text:span text:style-name="T4">public</text:span></text:span><text:span text:style-name="T2">.</text:span></text:p>
        </text:list-item>
        <text:list-item>
          <text:p text:style-name="P26"><text:span text:style-name="T2">Il simbolo </text:span><text:span text:style-name="Source_20_Text"><text:span text:style-name="T4">-</text:span></text:span><text:span text:style-name="T2"> si traduce in </text:span><text:span text:style-name="Source_20_Text"><text:span text:style-name="T4">private</text:span></text:span><text:span text:style-name="T2">.</text:span></text:p>
        </text:list-item>
      </text:list>
      <text:h text:style-name="P27" text:outline-level="3">2. Ereditarietà (Freccia continua con punta vuota)</text:h>
      <text:p text:style-name="P25">Quando una classe (Sottoclasse) punta verso un'altra (Superclasse) con una linea continua e un triangolo vuoto:</text:p>
      <text:list text:style-name="L3">
        <text:list-item>
          <text:p text:style-name="P28"><text:span text:style-name="T4">Traduzione classe:</text:span><text:span text:style-name="T2"> Aggiungi </text:span><text:span text:style-name="Source_20_Text"><text:span text:style-name="T4">extends NomePadre</text:span></text:span><text:span text:style-name="T2"> alla dichiarazione della classe.</text:span></text:p>
        </text:list-item>
        <text:list-item>
          <text:p text:style-name="P28"><text:span text:style-name="T4">Traduzione costruttore:</text:span><text:span text:style-name="T2"> La primissima riga del costruttore della sottoclasse </text:span><text:span text:style-name="T3">deve</text:span><text:span text:style-name="T2"> essere </text:span><text:span text:style-name="Source_20_Text"><text:span text:style-name="T4">super(parametri_del_padre);</text:span></text:span><text:span text:style-name="T2">.</text:span></text:p>
        </text:list-item>
        <text:list-item>
          <text:p text:style-name="P28"><text:span text:style-name="T4">Overriding:</text:span><text:span text:style-name="T2"> Se la sottoclasse ha un metodo con lo stesso nome del padre, devi riscriverne la logica per "sovrascriverlo" (aggiungendo </text:span><text:span text:style-name="Source_20_Text"><text:span text:style-name="T2">@Override</text:span></text:span><text:span text:style-name="T2"> sopra il metodo per buona prassi).</text:span></text:p>
        </text:list-item>
      </text:list>
      <text:h text:style-name="P27" text:outline-level="3">3. Interfacce (Freccia tratteggiata con punta vuota)</text:h>
      <text:p text:style-name="Text_20_body"><text:span text:style-name="T2">Quando vedi una classe o l'etichetta </text:span><text:span text:style-name="Source_20_Text"><text:span text:style-name="T2">&lt;&lt;interface&gt;&gt;</text:span></text:span><text:span text:style-name="T2"> e una linea tratteggiata che punta verso di essa:</text:span></text:p>
      <text:list text:style-name="L4">
        <text:list-item>
          <text:p text:style-name="P29"><text:span text:style-name="T4">L'Interfaccia:</text:span><text:span text:style-name="T2"> Si dichiara con </text:span><text:span text:style-name="Source_20_Text"><text:span text:style-name="T2">public interface NomeInterfaccia</text:span></text:span><text:span text:style-name="T2">. I metodi al suo interno </text:span><text:span text:style-name="T3">non hanno le parentesi graffe</text:span><text:span text:style-name="T2">, finiscono subito con il punto e virgola (es. </text:span><text:span text:style-name="Source_20_Text"><text:span text:style-name="T2">public boolean isDisponibile();</text:span></text:span><text:span text:style-name="T2">).</text:span></text:p>
        </text:list-item>
        <text:list-item>
          <text:p text:style-name="P29"><text:span text:style-name="T4">Traduzione classe:</text:span><text:span text:style-name="T2"> Usa la parola chiave </text:span><text:span text:style-name="Source_20_Text"><text:span text:style-name="T4">implements NomeInterfaccia</text:span></text:span><text:span text:style-name="T2">.</text:span></text:p>
        </text:list-item>
        <text:list-item>
          <text:p text:style-name="P30"><text:span text:style-name="T1">L'Obbligo:</text:span> La classe che implementa l'interfaccia <text:span text:style-name="T5">deve</text:span> obbligatoriamente scrivere il codice di tutti i metodi elencati nell'interfaccia.</text:p>
        </text:list-item>
      </text:list>
      <text:h text:style-name="Heading_20_3" text:outline-level="3"><text:span text:style-name="T2">4. Associazione 1 a Molti (Linea con un asterisco </text:span><text:span text:style-name="Source_20_Text"><text:span text:style-name="T2">*</text:span></text:span><text:span text:style-name="T2">)</text:span></text:h>
      <text:p text:style-name="Text_20_body"><text:span text:style-name="T2">Quando una classe è collegata a un'altra e c'è un </text:span><text:span text:style-name="Source_20_Text"><text:span text:style-name="T2">*</text:span></text:span><text:span text:style-name="T2"> (o </text:span><text:span text:style-name="Source_20_Text"><text:span text:style-name="T2">0..*</text:span></text:span><text:span text:style-name="T2">, </text:span><text:span text:style-name="Source_20_Text"><text:span text:style-name="T2">1..*</text:span></text:span><text:span text:style-name="T2">):</text:span></text:p>
      <text:list text:style-name="L5">
        <text:list-item>
          <text:p text:style-name="P31"><text:span text:style-name="T4">Attributo:</text:span><text:span text:style-name="T2"> Significa che hai una collezione. Usa un </text:span><text:span text:style-name="Source_20_Text"><text:span text:style-name="T2">ArrayList</text:span></text:span><text:span text:style-name="T2">.</text:span></text:p>
          <text:list>
            <text:list-item>
              <text:p text:style-name="P31"><text:span text:style-name="T3">Sintassi:</text:span><text:span text:style-name="T2"> </text:span><text:span text:style-name="Source_20_Text"><text:span text:style-name="T2">public List&lt;NomeAltraClasse&gt; listaOggetti;</text:span></text:span></text:p>
            </text:list-item>
          </text:list>
        </text:list-item>
        <text:list-item>
          <text:p text:style-name="P32"><text:span text:style-name="T1">Costruttore:</text:span> Devi <text:span text:style-name="T5">sempre</text:span> inizializzare la lista nel costruttore, altrimenti il codice crasherà!</text:p>
          <text:list>
            <text:list-item>
              <text:p text:style-name="P31"><text:span text:style-name="T3">Sintassi nel costruttore:</text:span><text:span text:style-name="T2"> </text:span><text:span text:style-name="Source_20_Text"><text:span text:style-name="T2">this.listaOggetti = new ArrayList&lt;&gt;();</text:span></text:span></text:p>
            </text:list-item>
          </text:list>
        </text:list-item>
        <text:list-item>
          <text:p text:style-name="P32"><text:span text:style-name="T1">Metodo di aggiunta:</text:span> Solitamente ci sarà un metodo per aggiungere elementi.</text:p>
          <text:list>
            <text:list-item>
              <text:p text:style-name="P31"><text:span text:style-name="T3">Sintassi:</text:span><text:span text:style-name="T2"> </text:span><text:span text:style-name="Source_20_Text"><text:span text:style-name="T2">this.listaOggetti.add(oggetto);</text:span></text:span></text:p>
            </text:list-item>
          </text:list>
        </text:list-item>
      </text:list>
      <text:h text:style-name="P27" text:outline-level="3">5. Associazione 1 a 1 (Linea semplice senza asterisco)</text:h>
      <text:p text:style-name="Text_20_body"><text:span text:style-name="T2">Quando due classi sono collegate da una linea semplice (magari con scritto </text:span><text:span text:style-name="Source_20_Text"><text:span text:style-name="T2">1</text:span></text:span><text:span text:style-name="T2"> ai bordi):</text:span></text:p>
      <text:list text:style-name="L6">
        <text:list-item>
          <text:p text:style-name="P33"><text:span text:style-name="T1">Attributo:</text:span> Significa che un oggetto possiede direttamente un altro oggetto. Non serve nessuna lista.</text:p>
          <text:list>
            <text:list-item>
              <text:p text:style-name="P34"><text:soft-page-break/><text:span text:style-name="T3">Sintassi:</text:span><text:span text:style-name="T2"> </text:span><text:span text:style-name="Source_20_Text"><text:span text:style-name="T2">public NomeAltraClasse nomeVariabile;</text:span></text:span></text:p>
            </text:list-item>
          </text:list>
        </text:list-item>
        <text:list-item>
          <text:p text:style-name="P34"><text:span text:style-name="T4">Costruttore:</text:span><text:span text:style-name="T2"> Passerai questo oggetto come parametro nel costruttore e farai </text:span><text:span text:style-name="Source_20_Text"><text:span text:style-name="T2">this.nomeVariabile = nomeVariabile;</text:span></text:span><text:span text:style-name="T2">.</text:span></text:p>
        </text:list-item>
      </text:list>
      <text:p text:style-name="P35"/>
      <text:p text:style-name="P36"/>
      <text:p text:style-name="P36">Il Flow di scrittura (L'algoritmo da seguire all'esame per ogni classe):</text:p>
      <text:list text:style-name="L7">
        <text:list-item>
          <text:p text:style-name="P37"><text:span text:style-name="T2">Scrivi </text:span><text:span text:style-name="Source_20_Text"><text:span text:style-name="T2">public class NomeClasse</text:span></text:span><text:span text:style-name="T2"> (aggiungendo </text:span><text:span text:style-name="Source_20_Text"><text:span text:style-name="T2">extends</text:span></text:span><text:span text:style-name="T2"> o </text:span><text:span text:style-name="Source_20_Text"><text:span text:style-name="T2">implements</text:span></text:span><text:span text:style-name="T2"> se ci sono frecce).</text:span></text:p>
        </text:list-item>
        <text:list-item>
          <text:p text:style-name="P37"><text:span text:style-name="T2">Dichiara tutti gli attributi (traducendo i </text:span><text:span text:style-name="Source_20_Text"><text:span text:style-name="T2">+</text:span></text:span><text:span text:style-name="T2">, </text:span><text:span text:style-name="Source_20_Text"><text:span text:style-name="T2">-</text:span></text:span><text:span text:style-name="T2"> e le linee di associazione).</text:span></text:p>
        </text:list-item>
        <text:list-item>
          <text:p text:style-name="P37"><text:span text:style-name="T2">Scrivi il Costruttore (inserendo i parametri per tutti gli attributi, usando </text:span><text:span text:style-name="Source_20_Text"><text:span text:style-name="T2">this.</text:span></text:span><text:span text:style-name="T2">, ed eventualmente </text:span><text:span text:style-name="Source_20_Text"><text:span text:style-name="T2">super()</text:span></text:span><text:span text:style-name="T2"> come prima riga, inizializzando gli eventuali </text:span><text:span text:style-name="Source_20_Text"><text:span text:style-name="T2">ArrayList</text:span></text:span><text:span text:style-name="T2">).</text:span></text:p>
        </text:list-item>
        <text:list-item>
          <text:p text:style-name="P38">Scrivi i Metodi richiesti dal diagramma.</text:p>
        </text:list-item>
      </text:list>
      <text:p text:style-name="P23"><text:span text:style-name="Source_20_Text"><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7pt" style:font-name-complex="OpenSymbol" style:font-family-complex="OpenSymbol" style:font-charset-complex="x-symbol" style:font-size-complex="8pt"/>
    </style:style>
    <style:style style:name="Numbering_20_Symbols" style:display-name="Numbering Symbols" style:family="text">
      <style:text-properties fo:font-size="8pt" style:font-size-asian="7pt" style:font-size-complex="8p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3T12:32:32.318424414</meta:creation-date>
    <dc:date>2026-06-24T14:45:33.139540867</dc:date>
    <meta:editing-duration>PT6H46M24S</meta:editing-duration>
    <meta:editing-cycles>5</meta:editing-cycles>
    <meta:generator>LibreOffice/26.2.3.2$Linux_X86_64 LibreOffice_project/620$Build-2</meta:generator>
    <meta:document-statistic meta:table-count="0" meta:image-count="0" meta:object-count="0" meta:page-count="6" meta:paragraph-count="124" meta:word-count="2432" meta:character-count="16924" meta:non-whitespace-character-count="14587"/>
  </office:meta>
</office:document-meta>
</file>